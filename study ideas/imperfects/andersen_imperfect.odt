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writing-mode-automatic="false"/>
      <style:text-properties officeooo:paragraph-rsid="00176a66"/>
    </style:style>
    <style:style style:name="P2" style:family="paragraph" style:parent-style-name="Standard">
      <style:text-properties officeooo:paragraph-rsid="000a9617"/>
    </style:style>
    <style:style style:name="T1" style:family="text">
      <style:text-properties fo:font-family="Bukyvede" style:font-pitch="variable"/>
    </style:style>
    <style:style style:name="T2" style:family="text">
      <style:text-properties fo:font-family="'Menaion Medieval'" style:font-pitch="variable"/>
    </style:style>
    <style:style style:name="T3" style:family="text">
      <style:text-properties officeooo:rsid="000a9617"/>
    </style:style>
    <style:style style:name="T4" style:family="text">
      <style:text-properties officeooo:rsid="000d0ec5"/>
    </style:style>
    <style:style style:name="T5" style:family="text">
      <style:text-properties officeooo:rsid="000f4516"/>
    </style:style>
    <style:style style:name="T6" style:family="text">
      <style:text-properties officeooo:rsid="000e1af3"/>
    </style:style>
    <style:style style:name="T7" style:family="text">
      <style:text-properties officeooo:rsid="000fbc93"/>
    </style:style>
    <style:style style:name="T8" style:family="text">
      <style:text-properties officeooo:rsid="0014edd8"/>
    </style:style>
    <style:style style:name="T9" style:family="text">
      <style:text-properties officeooo:rsid="00163abe"/>
    </style:style>
    <style:style style:name="T10" style:family="text">
      <style:text-properties officeooo:rsid="0011c7e2"/>
    </style:style>
    <style:style style:name="T11" style:family="text">
      <style:text-properties officeooo:rsid="001411b6"/>
    </style:style>
    <style:style style:name="T12" style:family="text">
      <style:text-properties officeooo:rsid="00176a66"/>
    </style:style>
    <style:style style:name="T13" style:family="text">
      <style:text-properties officeooo:rsid="001b4375"/>
    </style:style>
    <style:style style:name="T14" style:family="text">
      <style:text-properties fo:font-style="italic" officeooo:rsid="00176a66" style:font-style-asian="italic" style:font-style-complex="italic"/>
    </style:style>
    <style:style style:name="T15" style:family="text">
      <style:text-properties fo:font-style="normal" officeooo:rsid="00176a66" style:font-style-asian="normal" style:font-style-complex="normal"/>
    </style:style>
    <style:style style:name="T16" style:family="text">
      <style:text-properties fo:font-style="normal" officeooo:rsid="0018385d" style:font-style-asian="normal" style:font-style-complex="normal"/>
    </style:style>
    <style:style style:name="T17" style:family="text">
      <style:text-properties fo:font-style="italic" officeooo:rsid="0018385d" style:font-style-asian="italic" style:font-style-complex="italic"/>
    </style:style>
    <style:style style:name="T18" style:family="text">
      <style:text-properties fo:font-style="normal" officeooo:rsid="001b4375" style:font-style-asian="normal" style:font-style-complex="normal"/>
    </style:style>
    <style:style style:name="T19" style:family="text">
      <style:text-properties fo:font-family="Bukyvede" style:font-pitch="variable" fo:font-style="normal" officeooo:rsid="001b4375" style:font-style-asian="normal" style:font-style-complex="normal"/>
    </style:style>
    <style:style style:name="T20" style:family="text">
      <style:text-properties style:font-name="Liberation Serif" fo:font-style="normal" officeooo:rsid="001b4375" style:font-style-asian="normal" style:font-style-complex="normal"/>
    </style:style>
    <style:style style:name="T21" style:family="text">
      <style:text-properties style:font-name="Liberation Serif" fo:font-style="normal" officeooo:rsid="001c66df" style:font-style-asian="normal" style:font-style-complex="normal"/>
    </style:style>
    <style:style style:name="T22" style:family="text">
      <style:text-properties style:font-name="Liberation Serif" fo:font-style="normal" officeooo:rsid="0022206c" style:font-style-asian="normal" style:font-style-complex="normal"/>
    </style:style>
    <style:style style:name="T23" style:family="text">
      <style:text-properties style:font-name="Liberation Serif" fo:font-style="italic" officeooo:rsid="001b4375" style:font-style-asian="italic" style:font-style-complex="italic"/>
    </style:style>
    <style:style style:name="T24" style:family="text">
      <style:text-properties style:font-name="Liberation Serif" fo:font-style="normal" officeooo:rsid="001c70fb" style:font-style-asian="normal" style:font-style-complex="normal"/>
    </style:style>
    <style:style style:name="T25" style:family="text">
      <style:text-properties style:font-name="Liberation Serif" fo:font-style="normal" officeooo:rsid="001d2f14" style:font-style-asian="normal" style:font-style-complex="normal"/>
    </style:style>
    <style:style style:name="T26" style:family="text">
      <style:text-properties style:text-position="super 58%" style:font-name="Liberation Serif" fo:font-style="normal" officeooo:rsid="001d2f14" style:font-style-asian="normal" style:font-style-complex="normal"/>
    </style:style>
    <style:style style:name="T27" style:family="text">
      <style:text-properties style:font-name="Liberation Serif" fo:font-style="normal" fo:font-weight="bold" officeooo:rsid="001d2f14" style:font-style-asian="normal" style:font-weight-asian="bold" style:font-style-complex="normal" style:font-weight-complex="bold"/>
    </style:style>
    <style:style style:name="T28" style:family="text">
      <style:text-properties style:font-name="Liberation Serif" fo:font-style="normal" officeooo:rsid="001d7594" style:font-style-asian="normal" style:font-style-complex="normal"/>
    </style:style>
    <style:style style:name="T29" style:family="text">
      <style:text-properties style:font-name="Liberation Serif" fo:font-style="normal" officeooo:rsid="001f0f5c"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nning Andersen in Section 4 of his 2014 article on Slavic vowel-contractions makes some sweeping claims about the supposed ancientness of certain Old Russian (and Old Czech) imperfect forms which have traditionally been viewed as later analogical formations. At issue are the imperfects of class 4 verbs with infinitives in LCS *-iti, which in Old Church Slavonic build their imperfects exclusively off a jotated form of the stem (e.g. <text:span text:style-name="T1">ношаахѫ</text:span> &lt;*nos-j-ě-axǫ from nositi). Old Russian documents, on the other hand, show imperfect forms which appear to derive from the bare, non-jotated stem, e.g. <text:span text:style-name="T2">носѧхѹ</text:span> &lt; *nos-ěaxǫ, in addition to jotated forms like <text:span text:style-name="T2">ношаше</text:span>. <text:span text:style-name="T3">In characteristically </text:span><text:span text:style-name="T4">deceptive</text:span><text:span text:style-name="T3"> fashion, Andersen constructs his discussion as if the </text:span><text:span text:style-name="T5">primacy of these OR </text:span><text:span text:style-name="T3">non-jotated forms were </text:span><text:span text:style-name="T5">an uncontroversial and well-established fact</text:span><text:span text:style-name="T4"> (p.71 “in OCz. and OR [the LCS infix *‑ě‑] replaces the Class IV.A marker ‑i‑ ”), </text:span><text:span text:style-name="T5">and even calls the OCS jotated forms “innovated” (p.78-79), </text:span><text:span text:style-name="T6">without even </text:span><text:span text:style-name="T7">the slightest attempt to buttress this assertion </text:span><text:span text:style-name="T8">by </text:span><text:span text:style-name="T9">any </text:span><text:span text:style-name="T8">engagement with </text:span><text:span text:style-name="T10">the </text:span><text:span text:style-name="T11">actual </text:span><text:span text:style-name="T10">philological facts. </text:span><text:span text:style-name="T9">The alternative </text:span><text:span text:style-name="T12">view</text:span><text:span text:style-name="T9"> is </text:span><text:span text:style-name="T12">of course </text:span><text:span text:style-name="T9">that </text:span><text:span text:style-name="T12">the non-jotated </text:span><text:span text:style-name="T9">OR forms </text:span><text:span text:style-name="T12">arose by simple levelling on the basis of </text:span><text:span text:style-name="T13">the </text:span><text:span text:style-name="T12">non-jotated stem, as has demonstrably occurred in </text:span><text:span text:style-name="T13">the attested history of</text:span><text:span text:style-name="T12"> Bulgarian, where the modern imperfects </text:span><text:span text:style-name="T14">носех, носеше</text:span><text:span text:style-name="T15"> have been reformed out of the non-jotated stem /nos-/ + the contracted /ěx/ reflex of *ě‑axъ, </text:span><text:span text:style-name="T16">replacing expected **</text:span><text:span text:style-name="T17">ношах</text:span><text:span text:style-name="T16">, **</text:span><text:span text:style-name="T17">ношаше</text:span><text:span text:style-name="T16"> continuants of </text:span><text:span text:style-name="T18">the OCS </text:span><text:span text:style-name="T19">ношаахъ</text:span><text:span text:style-name="T18">, </text:span><text:span text:style-name="T19">ношааше</text:span><text:span text:style-name="T20">. Russian scholarship takes this levelling explanation for the OR non-jotated imperfects as a given, </text:span><text:span text:style-name="T21">to the extent that</text:span><text:span text:style-name="T20"> Krys’ko &amp; Petrukhin’</text:span><text:span text:style-name="T21">s</text:span><text:span text:style-name="T20"> (2020) article on the </text:span><text:span text:style-name="T21">history</text:span><text:span text:style-name="T20"> of </text:span><text:span text:style-name="T22">the </text:span><text:span text:style-name="T20">Russian past tense </text:span><text:span text:style-name="T21">dedicates </text:span><text:span text:style-name="T20">just half a sentence to such forms: “у глаголов с основой инф. на -</text:span><text:span text:style-name="T23">и </text:span><text:span text:style-name="T20">нередко наблюдается выравнивание основы с устранением чередования, возникавшего по йотовой палатализации: </text:span><text:span text:style-name="T23">приходяху </text:span><text:span text:style-name="T20">вм. </text:span><text:span text:style-name="T23">прихожаху</text:span><text:span text:style-name="T20">”. </text:span><text:span text:style-name="T24">Similarly Ivanov (1982: </text:span><text:span text:style-name="T25">71</text:span><text:span text:style-name="T24">) </text:span><text:span text:style-name="T25">does not adduce any non-jotated class 4 imperfects in his discussion of 11</text:span><text:span text:style-name="T26">th</text:span><text:span text:style-name="T25"> century East Slavic documents, and mentions them only in his discussion of 12th-14th century, where his choice of words (p.84, “Эти морфонологические чередования в целом </text:span><text:span text:style-name="T27">сохраняются</text:span><text:span text:style-name="T25"> </text:span><text:span text:style-name="T25">в имперфектных формах и в памятниках X II—XIV вв… однако наряду с ними, </text:span><text:span text:style-name="T25">причем в достаточно большом количестве случаев, в этих памятниках обнаруживаются и факты отсутствия таких чередований”) </text:span><text:span text:style-name="T28">suggests that </text:span><text:span text:style-name="T22">he too considers them a</text:span><text:span text:style-name="T29"> </text:span><text:span text:style-name="T22">later Old Russian innovation</text:span><text:span text:style-name="T29">.</text:span></text:p>
      <text:p text:style-name="Standard"/>
      <text:p text:style-name="P2">The imperfect’s absence from both business documents (charters, treaties etc.) and personal correspondence (Birchbark letters) has long been cited as a reason to doubt its survival in the live spoken language of the Old Russian period, but the existence of these non-jotated class 4 types not found in OCS, as well as the particular OR &lt;<text:span text:style-name="T2">ѧх</text:span>&gt; spelling of contracted *ěax-, which uses the OCS letter for *ę and thus has to be an indigenous development, mean that it cannot have been a wholly literary form borrowed from South Slavic protographs, at least not at the beginning of East Slavic literacy. If Andersen’s claim that non-jotated class 4 forms are the indigenous OR ones is correct, then we would expect...</text:p>
      <text:p text:style-name="Standard"/>
      <text:p text:style-name="Standard">The aim of th</text:p>
      <text:p text:style-name="Standard"/>
      <text:p text:style-name="Standard"/>
      <text:p text:style-name="Standard"/>
      <text:p text:style-name="Standard"/>
      <text:p text:style-name="Standard">Историческая грамматика русского языка: Морфология, глагол / [Р. И. Аванесов, В. В. Иванов, В. Б. Силина и др.]; Под ред. Р. И. Аванесова, В. В. Иванова. — Москва : Наука, 1982.</text:p>
      <text:p text:style-name="Standard"/>
      <text:p text:style-name="Standard">Крысько, В.Б. Историческая грамматика русского языка: энциклопедический словарь. Москва. 20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4T07:09:50.807888977</meta:creation-date>
    <dc:date>2026-06-04T08:39:47.921445229</dc:date>
    <meta:editing-duration>PT46M20S</meta:editing-duration>
    <meta:editing-cycles>21</meta:editing-cycles>
    <meta:generator>LibreOffice/26.2.1.2$Linux_X86_64 LibreOffice_project/620$Build-2</meta:generator>
    <meta:document-statistic meta:table-count="0" meta:image-count="0" meta:object-count="0" meta:page-count="1" meta:paragraph-count="5" meta:word-count="538" meta:character-count="3449" meta:non-whitespace-character-count="2916"/>
  </office:meta>
</office:document-meta>
</file>