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a846f" officeooo:paragraph-rsid="001a846f"/>
    </style:style>
    <style:style style:name="T1" style:family="text">
      <style:text-properties officeooo:rsid="001bc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anuscript I have submitted was created using LibreOffice Writer rather than Microsoft Word, so the .docx format displays slightly differently to the .odt format I used to write it. I have included in the "Additional File for Review but Not for Publication" catgeory both the original .odt file and a .pdf based on that .odt, and the .pdf is the one which is guaranteed to display as intended. I have also included various .ttf font-files which I have used for OCS or Old Russian text, as well as Bookerly font which is used to properly display latin characters with unusual combinations of diacritic<text:span text:style-name="T1">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04:46:38.847811295</meta:creation-date>
    <dc:date>2026-06-11T04:54:51.303774876</dc:date>
    <meta:editing-duration>PT8M12S</meta:editing-duration>
    <meta:editing-cycles>2</meta:editing-cycles>
    <meta:generator>LibreOffice/26.2.0.3$Linux_X86_64 LibreOffice_project/620$Build-3</meta:generator>
    <meta:document-statistic meta:table-count="0" meta:image-count="0" meta:object-count="0" meta:page-count="1" meta:paragraph-count="1" meta:word-count="104" meta:character-count="606" meta:non-whitespace-character-count="503"/>
  </office:meta>
</office:document-meta>
</file>