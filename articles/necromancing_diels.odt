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047ef8" officeooo:paragraph-rsid="08047ef8" style:font-weight-asian="normal" style:font-weight-complex="normal"/>
    </style:style>
    <style:style style:name="P17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7" style:family="paragraph" style:parent-style-name="Standard">
      <style:text-properties style:text-underline-style="none" fo:font-weight="normal" officeooo:rsid="07b64a91" officeooo:paragraph-rsid="07b64a91" style:font-weight-asian="normal" style:font-weight-complex="normal"/>
    </style:style>
    <style:style style:name="P178" style:family="paragraph" style:parent-style-name="Standard">
      <style:text-properties style:text-underline-style="none" fo:font-weight="normal" officeooo:rsid="08eb211d" officeooo:paragraph-rsid="08f1e02a" style:font-weight-asian="normal" style:font-weight-complex="normal"/>
    </style:style>
    <style:style style:name="P179"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0"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1"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2"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3"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4" style:family="paragraph" style:parent-style-name="Standard">
      <style:text-properties style:text-underline-style="none" fo:font-weight="normal" officeooo:rsid="07dc6795" officeooo:paragraph-rsid="08c3f2d6" style:font-weight-asian="normal" style:font-weight-complex="normal"/>
    </style:style>
    <style:style style:name="P185" style:family="paragraph" style:parent-style-name="Standard">
      <style:text-properties style:text-underline-style="none" fo:font-weight="normal" officeooo:rsid="07dc6795" officeooo:paragraph-rsid="08c17273" style:font-weight-asian="normal" style:font-weight-complex="normal"/>
    </style:style>
    <style:style style:name="P186"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87"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88" style:family="paragraph" style:parent-style-name="Standard">
      <style:text-properties style:text-underline-style="none" fo:font-weight="normal" officeooo:rsid="07c8a73c" officeooo:paragraph-rsid="07c8a73c" style:font-weight-asian="normal" style:font-weight-complex="normal"/>
    </style:style>
    <style:style style:name="P189" style:family="paragraph" style:parent-style-name="Standard">
      <style:text-properties style:text-underline-style="none" fo:font-weight="normal" officeooo:rsid="07c9a82a" officeooo:paragraph-rsid="07cb848a" style:font-weight-asian="normal" style:font-weight-complex="normal"/>
    </style:style>
    <style:style style:name="P190" style:family="paragraph" style:parent-style-name="Footnote">
      <style:text-properties officeooo:rsid="07cf7ef2" officeooo:paragraph-rsid="07cf7ef2"/>
    </style:style>
    <style:style style:name="P191" style:family="paragraph" style:parent-style-name="Standard">
      <style:text-properties style:text-underline-style="none" officeooo:rsid="02bd28bc" officeooo:paragraph-rsid="07c8a73c"/>
    </style:style>
    <style:style style:name="P192" style:family="paragraph" style:parent-style-name="Standard">
      <style:text-properties style:text-underline-style="none" officeooo:rsid="02bd28bc" officeooo:paragraph-rsid="0529410f"/>
    </style:style>
    <style:style style:name="P19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4" style:family="paragraph" style:parent-style-name="Standard">
      <style:text-properties style:text-underline-style="none" fo:font-weight="normal" officeooo:rsid="05f86d8e" officeooo:paragraph-rsid="05f86d8e" style:font-weight-asian="normal" style:font-weight-complex="normal"/>
    </style:style>
    <style:style style:name="P195" style:family="paragraph" style:parent-style-name="Standard">
      <style:text-properties style:text-underline-style="none" fo:font-weight="normal" officeooo:rsid="06ba1e64" officeooo:paragraph-rsid="06ba1e64" style:font-weight-asian="normal" style:font-weight-complex="normal"/>
    </style:style>
    <style:style style:name="P19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9" style:family="paragraph" style:parent-style-name="Standard">
      <style:text-properties fo:font-style="normal" fo:font-weight="normal" officeooo:paragraph-rsid="06c0ba31"/>
    </style:style>
    <style:style style:name="P20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9" style:family="paragraph" style:parent-style-name="Standard">
      <style:text-properties officeooo:paragraph-rsid="06d399e2"/>
    </style:style>
    <style:style style:name="P210" style:family="paragraph" style:parent-style-name="Standard">
      <style:text-properties officeooo:paragraph-rsid="06bf3506"/>
    </style:style>
    <style:style style:name="P211" style:family="paragraph" style:parent-style-name="Standard">
      <style:text-properties officeooo:paragraph-rsid="06d70e0d"/>
    </style:style>
    <style:style style:name="P212" style:family="paragraph" style:parent-style-name="Standard">
      <style:text-properties fo:font-style="normal" officeooo:rsid="06d70e0d" officeooo:paragraph-rsid="06d70e0d" style:font-style-asian="normal" style:font-style-complex="normal"/>
    </style:style>
    <style:style style:name="P21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2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3" style:family="paragraph" style:parent-style-name="Table_20_Heading">
      <style:text-properties officeooo:rsid="0813088c" officeooo:paragraph-rsid="0813088c"/>
    </style:style>
    <style:style style:name="P224" style:family="paragraph" style:parent-style-name="Table_20_Heading">
      <style:paragraph-properties fo:text-align="center" style:justify-single-word="false"/>
      <style:text-properties officeooo:rsid="0813088c" officeooo:paragraph-rsid="0813088c"/>
    </style:style>
    <style:style style:name="P225" style:family="paragraph" style:parent-style-name="Table_20_Heading">
      <style:paragraph-properties fo:text-align="center" style:justify-single-word="false"/>
      <style:text-properties officeooo:rsid="08621bd7" officeooo:paragraph-rsid="08621bd7"/>
    </style:style>
    <style:style style:name="P226" style:family="paragraph" style:parent-style-name="Table_20_Contents">
      <style:paragraph-properties fo:text-align="center" style:justify-single-word="false"/>
      <style:text-properties style:font-name="Bukyvede1" officeooo:rsid="0815df31" officeooo:paragraph-rsid="0815df31"/>
    </style:style>
    <style:style style:name="P227" style:family="paragraph" style:parent-style-name="Table_20_Contents">
      <style:paragraph-properties fo:text-align="center" style:justify-single-word="false"/>
      <style:text-properties officeooo:rsid="081ad316" officeooo:paragraph-rsid="081ad316"/>
    </style:style>
    <style:style style:name="P228" style:family="paragraph" style:parent-style-name="Table_20_Contents">
      <style:paragraph-properties fo:text-align="center" style:justify-single-word="false"/>
      <style:text-properties style:font-name="Bukyvede1" officeooo:rsid="08621bd7" officeooo:paragraph-rsid="08621bd7"/>
    </style:style>
    <style:style style:name="P229" style:family="paragraph" style:parent-style-name="Table_20_Contents">
      <style:paragraph-properties fo:text-align="center" style:justify-single-word="false"/>
      <style:text-properties style:font-name="Bukyvede1" officeooo:rsid="08621bd7" officeooo:paragraph-rsid="08a8c6fa"/>
    </style:style>
    <style:style style:name="P230" style:family="paragraph" style:parent-style-name="Table_20_Contents">
      <style:paragraph-properties fo:text-align="center" style:justify-single-word="false"/>
      <style:text-properties style:font-name="Liberation Serif1" officeooo:rsid="081ad316" officeooo:paragraph-rsid="081ad316"/>
    </style:style>
    <style:style style:name="P231" style:family="paragraph" style:parent-style-name="Table_20_Contents">
      <style:paragraph-properties fo:text-align="center" style:justify-single-word="false"/>
      <style:text-properties style:font-name="Bukyvede1" officeooo:rsid="0864db48" officeooo:paragraph-rsid="0864db48"/>
    </style:style>
    <style:style style:name="P232" style:family="paragraph" style:parent-style-name="Table_20_Contents">
      <style:paragraph-properties fo:text-align="center" style:justify-single-word="false"/>
      <style:text-properties style:font-name="Bukyvede1" officeooo:rsid="0864db48" officeooo:paragraph-rsid="08a8c6fa"/>
    </style:style>
    <style:style style:name="P233" style:family="paragraph" style:parent-style-name="Table_20_Contents">
      <style:paragraph-properties fo:text-align="center" style:justify-single-word="false"/>
      <style:text-properties style:font-name="Bukyvede1" officeooo:rsid="08185f3e" officeooo:paragraph-rsid="08185f3e"/>
    </style:style>
    <style:style style:name="P234" style:family="paragraph" style:parent-style-name="Table_20_Contents">
      <style:paragraph-properties fo:text-align="center" style:justify-single-word="false"/>
      <style:text-properties officeooo:rsid="081c118e" officeooo:paragraph-rsid="081c118e"/>
    </style:style>
    <style:style style:name="P235" style:family="paragraph" style:parent-style-name="Table_20_Contents">
      <style:paragraph-properties fo:text-align="center" style:justify-single-word="false"/>
      <style:text-properties style:font-name="Liberation Serif1" officeooo:rsid="081c118e" officeooo:paragraph-rsid="081c118e"/>
    </style:style>
    <style:style style:name="P236" style:family="paragraph" style:parent-style-name="Table_20_Contents">
      <style:paragraph-properties fo:text-align="center" style:justify-single-word="false"/>
      <style:text-properties officeooo:rsid="081b159d" officeooo:paragraph-rsid="081b159d"/>
    </style:style>
    <style:style style:name="P237" style:family="paragraph" style:parent-style-name="Table_20_Contents">
      <style:paragraph-properties fo:text-align="center" style:justify-single-word="false"/>
      <style:text-properties style:font-name="Liberation Serif1" officeooo:rsid="085ce30a" officeooo:paragraph-rsid="085ce30a"/>
    </style:style>
    <style:style style:name="P238" style:family="paragraph" style:parent-style-name="Table_20_Contents">
      <style:paragraph-properties fo:text-align="center" style:justify-single-word="false"/>
      <style:text-properties style:font-name="Bukyvede1" officeooo:rsid="08185f3e" officeooo:paragraph-rsid="08198b8b"/>
    </style:style>
    <style:style style:name="P239" style:family="paragraph" style:parent-style-name="Table_20_Contents">
      <style:paragraph-properties fo:text-align="center" style:justify-single-word="false"/>
      <style:text-properties style:font-name="Bukyvede1" officeooo:rsid="081ad316" officeooo:paragraph-rsid="081ad316"/>
    </style:style>
    <style:style style:name="P240" style:family="paragraph" style:parent-style-name="Table_20_Contents">
      <style:paragraph-properties fo:text-align="center" style:justify-single-word="false"/>
      <style:text-properties style:font-name="Bukyvede1" officeooo:rsid="08650f14" officeooo:paragraph-rsid="08650f14"/>
    </style:style>
    <style:style style:name="P241" style:family="paragraph" style:parent-style-name="Table_20_Contents">
      <style:paragraph-properties fo:text-align="center" style:justify-single-word="false"/>
      <style:text-properties style:font-name="Calibri" officeooo:rsid="081b159d" officeooo:paragraph-rsid="081b159d"/>
    </style:style>
    <style:style style:name="P242" style:family="paragraph" style:parent-style-name="Table_20_Contents">
      <style:paragraph-properties fo:text-align="center" style:justify-single-word="false"/>
    </style:style>
    <style:style style:name="P243" style:family="paragraph" style:parent-style-name="Table_20_Contents">
      <style:paragraph-properties fo:text-align="center" style:justify-single-word="false"/>
      <style:text-properties style:font-name="Bukyvede1" officeooo:rsid="082219d0" officeooo:paragraph-rsid="082219d0"/>
    </style:style>
    <style:style style:name="P244" style:family="paragraph" style:parent-style-name="Table_20_Contents">
      <style:paragraph-properties fo:text-align="center" style:justify-single-word="false"/>
      <style:text-properties officeooo:paragraph-rsid="082219d0"/>
    </style:style>
    <style:style style:name="P245"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1" style:family="text">
      <style:text-properties officeooo:rsid="060870f1"/>
    </style:style>
    <style:style style:name="T1482" style:family="text">
      <style:text-properties officeooo:rsid="05e53750"/>
    </style:style>
    <style:style style:name="T1483" style:family="text">
      <style:text-properties style:font-name="Bukyvede1" style:text-underline-style="none" officeooo:rsid="05e53750"/>
    </style:style>
    <style:style style:name="T1484" style:family="text">
      <style:text-properties style:font-name="Bukyvede1" officeooo:rsid="05e53750"/>
    </style:style>
    <style:style style:name="T1485" style:family="text">
      <style:text-properties style:font-name="Liberation Serif2" officeooo:rsid="05e53750"/>
    </style:style>
    <style:style style:name="T148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5" style:family="text">
      <style:text-properties style:font-name="Bukyvede1" style:text-underline-style="none"/>
    </style:style>
    <style:style style:name="T1496" style:family="text">
      <style:text-properties officeooo:rsid="085af7a0"/>
    </style:style>
    <style:style style:name="T1497" style:family="text">
      <style:text-properties officeooo:rsid="05f2ae06"/>
    </style:style>
    <style:style style:name="T1498" style:family="text">
      <style:text-properties officeooo:rsid="05f69f9a"/>
    </style:style>
    <style:style style:name="T14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0" style:family="text">
      <style:text-properties officeooo:rsid="0795d5c1"/>
    </style:style>
    <style:style style:name="T1501" style:family="text">
      <style:text-properties officeooo:rsid="0648645b"/>
    </style:style>
    <style:style style:name="T1502" style:family="text">
      <style:text-properties officeooo:rsid="0644b06a"/>
    </style:style>
    <style:style style:name="T1503" style:family="text">
      <style:text-properties style:text-underline-style="none" fo:font-weight="normal" officeooo:rsid="06420f21" style:font-weight-asian="normal" style:font-weight-complex="normal"/>
    </style:style>
    <style:style style:name="T1504" style:family="text">
      <style:text-properties style:text-underline-style="none" fo:font-weight="normal" officeooo:rsid="0642ff82" style:font-weight-asian="normal" style:font-weight-complex="normal"/>
    </style:style>
    <style:style style:name="T1505" style:family="text">
      <style:text-properties style:text-underline-style="none" fo:font-weight="normal" officeooo:rsid="0644b06a" style:font-weight-asian="normal" style:font-weight-complex="normal"/>
    </style:style>
    <style:style style:name="T1506" style:family="text">
      <style:text-properties style:text-underline-style="none" fo:font-weight="normal" officeooo:rsid="064dfdad" style:font-weight-asian="normal" style:font-weight-complex="normal"/>
    </style:style>
    <style:style style:name="T1507" style:family="text">
      <style:text-properties style:text-underline-style="none" fo:font-weight="normal" officeooo:rsid="06500a48" style:font-weight-asian="normal" style:font-weight-complex="normal"/>
    </style:style>
    <style:style style:name="T1508" style:family="text">
      <style:text-properties style:text-underline-style="none" fo:font-weight="normal" officeooo:rsid="064c725a" style:font-weight-asian="normal" style:font-weight-complex="normal"/>
    </style:style>
    <style:style style:name="T1509" style:family="text">
      <style:text-properties style:text-underline-style="none" fo:font-weight="normal" officeooo:rsid="064fdbec" style:font-weight-asian="normal" style:font-weight-complex="normal"/>
    </style:style>
    <style:style style:name="T1510" style:family="text">
      <style:text-properties style:text-underline-style="none" fo:font-weight="normal" officeooo:rsid="06e8974c" style:font-weight-asian="normal" style:font-weight-complex="normal"/>
    </style:style>
    <style:style style:name="T1511" style:family="text">
      <style:text-properties style:font-name="Bukyvede1" style:text-underline-style="none" fo:font-weight="normal" officeooo:rsid="0645b18b" style:font-weight-asian="normal" style:font-weight-complex="normal"/>
    </style:style>
    <style:style style:name="T1512" style:family="text">
      <style:text-properties style:text-underline-style="none" fo:font-weight="normal" officeooo:rsid="068c7b6a" style:font-weight-asian="normal" style:font-weight-complex="normal"/>
    </style:style>
    <style:style style:name="T1513" style:family="text">
      <style:text-properties style:text-underline-style="none" fo:font-weight="normal" officeooo:rsid="0650f8dc" style:font-weight-asian="normal" style:font-weight-complex="normal"/>
    </style:style>
    <style:style style:name="T1514" style:family="text">
      <style:text-properties fo:font-style="italic" style:text-underline-style="none" fo:font-weight="normal" officeooo:rsid="0650f8dc" style:font-style-asian="italic" style:font-weight-asian="normal" style:font-style-complex="italic" style:font-weight-complex="normal"/>
    </style:style>
    <style:style style:name="T1515" style:family="text">
      <style:text-properties fo:font-style="normal" style:text-underline-style="none" fo:font-weight="normal" officeooo:rsid="0650f8dc" style:font-style-asian="normal" style:font-weight-asian="normal" style:font-style-complex="normal" style:font-weight-complex="normal"/>
    </style:style>
    <style:style style:name="T1516" style:family="text">
      <style:text-properties style:text-underline-style="none" fo:font-weight="normal" officeooo:rsid="066fc240" style:font-weight-asian="normal" style:font-weight-complex="normal"/>
    </style:style>
    <style:style style:name="T1517" style:family="text">
      <style:text-properties style:text-underline-style="none" fo:font-weight="normal" style:font-weight-asian="normal" style:font-weight-complex="normal"/>
    </style:style>
    <style:style style:name="T1518" style:family="text">
      <style:text-properties style:text-underline-style="none" fo:font-weight="normal" officeooo:rsid="06566d22" style:font-weight-asian="normal" style:font-weight-complex="normal"/>
    </style:style>
    <style:style style:name="T1519" style:family="text">
      <style:text-properties style:text-underline-style="solid" style:text-underline-width="auto" style:text-underline-color="font-color" fo:font-weight="normal" style:font-weight-asian="normal" style:font-weight-complex="normal"/>
    </style:style>
    <style:style style:name="T1520" style:family="text">
      <style:text-properties style:text-underline-style="none" fo:font-weight="normal" officeooo:rsid="06547333" style:font-weight-asian="normal" style:font-weight-complex="normal"/>
    </style:style>
    <style:style style:name="T1521" style:family="text">
      <style:text-properties style:text-underline-style="none" fo:font-weight="normal" officeooo:rsid="065968d3" style:font-weight-asian="normal" style:font-weight-complex="normal"/>
    </style:style>
    <style:style style:name="T1522" style:family="text">
      <style:text-properties style:text-underline-style="none" fo:font-weight="normal" officeooo:rsid="0655c6d9" style:font-weight-asian="normal" style:font-weight-complex="normal"/>
    </style:style>
    <style:style style:name="T1523" style:family="text">
      <style:text-properties fo:font-style="italic" style:text-underline-style="none" fo:font-weight="normal" officeooo:rsid="06547333" style:font-style-asian="italic" style:font-weight-asian="normal" style:font-style-complex="italic" style:font-weight-complex="normal"/>
    </style:style>
    <style:style style:name="T15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7" style:family="text">
      <style:text-properties style:font-name="Liberation Serif1" style:text-underline-style="none" fo:font-weight="normal" officeooo:rsid="0655bd9f" style:font-weight-asian="normal" style:font-weight-complex="normal"/>
    </style:style>
    <style:style style:name="T15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2" style:family="text">
      <style:text-properties style:text-underline-style="none" fo:font-weight="normal" officeooo:rsid="06537e3a" style:font-weight-asian="normal" style:font-weight-complex="normal"/>
    </style:style>
    <style:style style:name="T1543" style:family="text">
      <style:text-properties fo:font-style="italic" style:text-underline-style="none" fo:font-weight="normal" officeooo:rsid="06537e3a" style:font-style-asian="italic" style:font-weight-asian="normal" style:font-style-complex="italic" style:font-weight-complex="normal"/>
    </style:style>
    <style:style style:name="T1544" style:family="text">
      <style:text-properties fo:font-style="normal" style:text-underline-style="none" fo:font-weight="normal" officeooo:rsid="06537e3a" style:font-style-asian="normal" style:font-weight-asian="normal" style:font-style-complex="normal" style:font-weight-complex="normal"/>
    </style:style>
    <style:style style:name="T1545" style:family="text">
      <style:text-properties fo:font-style="italic" style:text-underline-style="none" fo:font-weight="normal" officeooo:rsid="064fdbec" style:font-style-asian="italic" style:font-weight-asian="normal" style:font-style-complex="italic" style:font-weight-complex="normal"/>
    </style:style>
    <style:style style:name="T1546" style:family="text">
      <style:text-properties fo:font-style="normal" style:text-underline-style="none" fo:font-weight="normal" officeooo:rsid="064fdbec" style:font-style-asian="normal" style:font-weight-asian="normal" style:font-style-complex="normal" style:font-weight-complex="normal"/>
    </style:style>
    <style:style style:name="T1547" style:family="text">
      <style:text-properties fo:font-style="normal" style:text-underline-style="none" fo:font-weight="normal" officeooo:rsid="065dca02" style:font-style-asian="normal" style:font-weight-asian="normal" style:font-style-complex="normal" style:font-weight-complex="normal"/>
    </style:style>
    <style:style style:name="T1548" style:family="text">
      <style:text-properties fo:font-style="normal" style:text-underline-style="none" fo:font-weight="normal" officeooo:rsid="065f703d" style:font-style-asian="normal" style:font-weight-asian="normal" style:font-style-complex="normal" style:font-weight-complex="normal"/>
    </style:style>
    <style:style style:name="T1549" style:family="text">
      <style:text-properties fo:font-style="normal" style:text-underline-style="none" fo:font-weight="normal" officeooo:rsid="068d3864" style:font-style-asian="normal" style:font-weight-asian="normal" style:font-style-complex="normal" style:font-weight-complex="normal"/>
    </style:style>
    <style:style style:name="T1550" style:family="text">
      <style:text-properties officeooo:rsid="0662ecdd"/>
    </style:style>
    <style:style style:name="T1551" style:family="text">
      <style:text-properties officeooo:rsid="087c52b4"/>
    </style:style>
    <style:style style:name="T1552" style:family="text">
      <style:text-properties fo:font-family="'Menaion Medieval'" style:font-pitch="variable" style:text-underline-style="none" officeooo:rsid="0662ecdd"/>
    </style:style>
    <style:style style:name="T1553" style:family="text">
      <style:text-properties officeooo:rsid="0664f4c3"/>
    </style:style>
    <style:style style:name="T1554" style:family="text">
      <style:text-properties officeooo:rsid="06635c72"/>
    </style:style>
    <style:style style:name="T1555" style:family="text">
      <style:text-properties fo:font-family="'Menaion Medieval'" style:font-pitch="variable" officeooo:rsid="06635c72"/>
    </style:style>
    <style:style style:name="T1556" style:family="text">
      <style:text-properties fo:font-family="'Menaion Medieval'" style:font-pitch="variable" officeooo:rsid="0664f4c3"/>
    </style:style>
    <style:style style:name="T1557" style:family="text">
      <style:text-properties officeooo:rsid="0667993c"/>
    </style:style>
    <style:style style:name="T1558" style:family="text">
      <style:text-properties fo:font-style="normal" style:text-underline-style="none" fo:font-weight="normal" officeooo:rsid="0660c22b" style:font-style-asian="normal" style:font-weight-asian="normal" style:font-style-complex="normal" style:font-weight-complex="normal"/>
    </style:style>
    <style:style style:name="T1559" style:family="text">
      <style:text-properties fo:font-style="normal" style:text-underline-style="none" fo:font-weight="normal" officeooo:rsid="0645b18b" style:font-style-asian="normal" style:font-weight-asian="normal" style:font-style-complex="normal" style:font-weight-complex="normal"/>
    </style:style>
    <style:style style:name="T1560" style:family="text">
      <style:text-properties style:text-underline-style="none" fo:font-weight="normal" officeooo:rsid="064add14" style:font-weight-asian="normal" style:font-weight-complex="normal"/>
    </style:style>
    <style:style style:name="T1561" style:family="text">
      <style:text-properties style:text-underline-style="none" fo:font-weight="normal" officeooo:rsid="06b8b7c1" style:font-weight-asian="normal" style:font-weight-complex="normal"/>
    </style:style>
    <style:style style:name="T1562" style:family="text">
      <style:text-properties style:text-underline-style="none" fo:font-weight="normal" officeooo:rsid="06739196" style:font-weight-asian="normal" style:font-weight-complex="normal"/>
    </style:style>
    <style:style style:name="T1563" style:family="text">
      <style:text-properties style:text-underline-style="none" fo:font-weight="normal" officeooo:rsid="06751fb3" style:font-weight-asian="normal" style:font-weight-complex="normal"/>
    </style:style>
    <style:style style:name="T1564" style:family="text">
      <style:text-properties style:font-name="Bukyvede1" style:text-underline-style="none" fo:font-weight="normal" officeooo:rsid="06739196" style:font-weight-asian="normal" style:font-weight-complex="normal"/>
    </style:style>
    <style:style style:name="T15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8" style:family="text">
      <style:text-properties style:font-name="Liberation Serif2" style:text-underline-style="none" fo:font-weight="normal" officeooo:rsid="06739196" style:font-weight-asian="normal" style:font-weight-complex="normal"/>
    </style:style>
    <style:style style:name="T1569" style:family="text">
      <style:text-properties style:font-name="Liberation Serif2" style:text-underline-style="none" fo:font-weight="normal" officeooo:rsid="06b6bc8f" style:font-weight-asian="normal" style:font-weight-complex="normal"/>
    </style:style>
    <style:style style:name="T1570" style:family="text">
      <style:text-properties style:font-name="Liberation Serif2" style:text-underline-style="none" fo:font-weight="normal" officeooo:rsid="06740a5a" style:font-weight-asian="normal" style:font-weight-complex="normal"/>
    </style:style>
    <style:style style:name="T1571" style:family="text">
      <style:text-properties style:font-name="Bukyvede1" style:text-underline-style="none" fo:font-weight="normal" officeooo:rsid="06740a5a" style:font-weight-asian="normal" style:font-weight-complex="normal"/>
    </style:style>
    <style:style style:name="T1572" style:family="text">
      <style:text-properties style:font-name="Liberation Serif2" style:text-underline-style="none" fo:font-weight="normal" officeooo:rsid="080c7ca8" style:font-weight-asian="normal" style:font-weight-complex="normal"/>
    </style:style>
    <style:style style:name="T1573" style:family="text">
      <style:text-properties officeooo:rsid="067d1251"/>
    </style:style>
    <style:style style:name="T1574" style:family="text">
      <style:text-properties officeooo:rsid="067a6ea6"/>
    </style:style>
    <style:style style:name="T1575" style:family="text">
      <style:text-properties officeooo:rsid="067de501"/>
    </style:style>
    <style:style style:name="T1576" style:family="text">
      <style:text-properties officeooo:rsid="067d9fad"/>
    </style:style>
    <style:style style:name="T1577" style:family="text">
      <style:text-properties officeooo:rsid="067bbc90"/>
    </style:style>
    <style:style style:name="T1578" style:family="text">
      <style:text-properties officeooo:rsid="0685a096"/>
    </style:style>
    <style:style style:name="T1579" style:family="text">
      <style:text-properties officeooo:rsid="08e022a4"/>
    </style:style>
    <style:style style:name="T1580" style:family="text">
      <style:text-properties officeooo:rsid="08e1c8cd"/>
    </style:style>
    <style:style style:name="T1581" style:family="text">
      <style:text-properties officeooo:rsid="08e4b0bc"/>
    </style:style>
    <style:style style:name="T1582" style:family="text">
      <style:text-properties officeooo:rsid="08e3bf31"/>
    </style:style>
    <style:style style:name="T1583" style:family="text">
      <style:text-properties fo:font-weight="bold" officeooo:rsid="08e4b0bc" style:font-weight-asian="bold" style:font-weight-complex="bold"/>
    </style:style>
    <style:style style:name="T1584" style:family="text">
      <style:text-properties officeooo:rsid="08e3d611"/>
    </style:style>
    <style:style style:name="T1585" style:family="text">
      <style:text-properties officeooo:rsid="08e67372"/>
    </style:style>
    <style:style style:name="T1586" style:family="text">
      <style:text-properties officeooo:rsid="08e83591"/>
    </style:style>
    <style:style style:name="T1587" style:family="text">
      <style:text-properties officeooo:rsid="08e8550e"/>
    </style:style>
    <style:style style:name="T1588" style:family="text">
      <style:text-properties officeooo:rsid="08e9280c"/>
    </style:style>
    <style:style style:name="T1589" style:family="text">
      <style:text-properties officeooo:rsid="07cced55"/>
    </style:style>
    <style:style style:name="T1590" style:family="text">
      <style:text-properties officeooo:rsid="07cea72b"/>
    </style:style>
    <style:style style:name="T1591" style:family="text">
      <style:text-properties officeooo:rsid="07d62e4f"/>
    </style:style>
    <style:style style:name="T1592" style:family="text">
      <style:text-properties officeooo:rsid="07db2eaf"/>
    </style:style>
    <style:style style:name="T1593" style:family="text">
      <style:text-properties officeooo:rsid="07dc6795"/>
    </style:style>
    <style:style style:name="T1594" style:family="text">
      <style:text-properties officeooo:rsid="085b1db9"/>
    </style:style>
    <style:style style:name="T1595" style:family="text">
      <style:text-properties officeooo:rsid="07dc6795" fo:background-color="#acffac" loext:char-shading-value="0"/>
    </style:style>
    <style:style style:name="T1596" style:family="text">
      <style:text-properties officeooo:rsid="085b1db9" fo:background-color="#acffac" loext:char-shading-value="0"/>
    </style:style>
    <style:style style:name="T1597" style:family="text">
      <style:text-properties officeooo:rsid="08ddbe48" fo:background-color="#acffac" loext:char-shading-value="0"/>
    </style:style>
    <style:style style:name="T1598" style:family="text">
      <style:text-properties officeooo:rsid="07de69e8"/>
    </style:style>
    <style:style style:name="T1599" style:family="text">
      <style:text-properties officeooo:rsid="08c95b12"/>
    </style:style>
    <style:style style:name="T1600" style:family="text">
      <style:text-properties officeooo:rsid="08eb908d"/>
    </style:style>
    <style:style style:name="T1601" style:family="text">
      <style:text-properties officeooo:rsid="08ee2be7"/>
    </style:style>
    <style:style style:name="T1602" style:family="text">
      <style:text-properties officeooo:rsid="08f36d0f"/>
    </style:style>
    <style:style style:name="T1603" style:family="text">
      <style:text-properties officeooo:rsid="08f1e02a"/>
    </style:style>
    <style:style style:name="T1604" style:family="text">
      <style:text-properties officeooo:rsid="08cef02d"/>
    </style:style>
    <style:style style:name="T1605" style:family="text">
      <style:text-properties officeooo:rsid="08cf28db"/>
    </style:style>
    <style:style style:name="T1606" style:family="text">
      <style:text-properties officeooo:rsid="08cdcc33"/>
    </style:style>
    <style:style style:name="T1607" style:family="text">
      <style:text-properties officeooo:rsid="08cf3e7f"/>
    </style:style>
    <style:style style:name="T1608" style:family="text">
      <style:text-properties officeooo:rsid="08ca6aa2"/>
    </style:style>
    <style:style style:name="T1609" style:family="text">
      <style:text-properties style:font-name="Bukyvede1" officeooo:rsid="08ca6aa2"/>
    </style:style>
    <style:style style:name="T1610" style:family="text">
      <style:text-properties officeooo:rsid="0421bbfc"/>
    </style:style>
    <style:style style:name="T1611" style:family="text">
      <style:text-properties officeooo:rsid="08d0dda6"/>
    </style:style>
    <style:style style:name="T1612" style:family="text">
      <style:text-properties officeooo:rsid="07b58ad8"/>
    </style:style>
    <style:style style:name="T1613" style:family="text">
      <style:text-properties officeooo:rsid="07b73680"/>
    </style:style>
    <style:style style:name="T1614" style:family="text">
      <style:text-properties style:use-window-font-color="true" loext:opacity="0%" officeooo:rsid="08c3f2d6"/>
    </style:style>
    <style:style style:name="T1615" style:family="text">
      <style:text-properties style:use-window-font-color="true" loext:opacity="0%" officeooo:rsid="08d20876"/>
    </style:style>
    <style:style style:name="T1616" style:family="text">
      <style:text-properties style:use-window-font-color="true" loext:opacity="0%" officeooo:rsid="08d2a306"/>
    </style:style>
    <style:style style:name="T1617" style:family="text">
      <style:text-properties style:use-window-font-color="true" loext:opacity="0%" officeooo:rsid="08d882e4"/>
    </style:style>
    <style:style style:name="T1618" style:family="text">
      <style:text-properties style:use-window-font-color="true" loext:opacity="0%" officeooo:rsid="08d2d1dd"/>
    </style:style>
    <style:style style:name="T1619" style:family="text">
      <style:text-properties style:use-window-font-color="true" loext:opacity="0%" officeooo:rsid="08d37de5"/>
    </style:style>
    <style:style style:name="T1620" style:family="text">
      <style:text-properties style:use-window-font-color="true" loext:opacity="0%" officeooo:rsid="08d3b2c9"/>
    </style:style>
    <style:style style:name="T1621" style:family="text">
      <style:text-properties style:use-window-font-color="true" loext:opacity="0%" officeooo:rsid="08d56899"/>
    </style:style>
    <style:style style:name="T1622" style:family="text">
      <style:text-properties style:use-window-font-color="true" loext:opacity="0%" officeooo:rsid="08d9297a"/>
    </style:style>
    <style:style style:name="T1623" style:family="text">
      <style:text-properties officeooo:rsid="08f16dc9"/>
    </style:style>
    <style:style style:name="T1624" style:family="text">
      <style:text-properties officeooo:rsid="08d00718"/>
    </style:style>
    <style:style style:name="T1625" style:family="text">
      <style:text-properties officeooo:rsid="08cbcc81"/>
    </style:style>
    <style:style style:name="T1626" style:family="text">
      <style:text-properties officeooo:rsid="08cbcec5"/>
    </style:style>
    <style:style style:name="T1627" style:family="text">
      <style:text-properties officeooo:rsid="08cdc3aa"/>
    </style:style>
    <style:style style:name="T1628" style:family="text">
      <style:text-properties officeooo:rsid="07c6ba04"/>
    </style:style>
    <style:style style:name="T1629" style:family="text">
      <style:text-properties officeooo:rsid="07dd83f3"/>
    </style:style>
    <style:style style:name="T1630" style:family="text">
      <style:text-properties fo:color="#00a933" loext:opacity="100%" officeooo:rsid="087bb53c"/>
    </style:style>
    <style:style style:name="T1631" style:family="text">
      <style:text-properties officeooo:rsid="087bb53c"/>
    </style:style>
    <style:style style:name="T1632" style:family="text">
      <style:text-properties officeooo:rsid="087fcf7f"/>
    </style:style>
    <style:style style:name="T1633" style:family="text">
      <style:text-properties officeooo:rsid="087e49f8"/>
    </style:style>
    <style:style style:name="T1634" style:family="text">
      <style:text-properties officeooo:rsid="07cb4b20"/>
    </style:style>
    <style:style style:name="T1635" style:family="text">
      <style:text-properties officeooo:rsid="07cb848a"/>
    </style:style>
    <style:style style:name="T1636" style:family="text">
      <style:text-properties officeooo:rsid="07f0145d"/>
    </style:style>
    <style:style style:name="T1637" style:family="text">
      <style:text-properties officeooo:rsid="07ef5c27"/>
    </style:style>
    <style:style style:name="T1638" style:family="text">
      <style:text-properties officeooo:rsid="07d20769"/>
    </style:style>
    <style:style style:name="T1639" style:family="text">
      <style:text-properties officeooo:rsid="07d99cb7"/>
    </style:style>
    <style:style style:name="T1640" style:family="text">
      <style:text-properties officeooo:rsid="07d6105f"/>
    </style:style>
    <style:style style:name="T1641" style:family="text">
      <style:text-properties officeooo:rsid="07da2123"/>
    </style:style>
    <style:style style:name="T1642" style:family="text">
      <style:text-properties officeooo:rsid="07d827a0"/>
    </style:style>
    <style:style style:name="T1643" style:family="text">
      <style:text-properties officeooo:rsid="06f6507b"/>
    </style:style>
    <style:style style:name="T1644" style:family="text">
      <style:text-properties fo:font-style="italic" officeooo:rsid="06bf3506" style:font-style-asian="italic" style:font-style-complex="italic"/>
    </style:style>
    <style:style style:name="T1645" style:family="text">
      <style:text-properties officeooo:rsid="06bf3506"/>
    </style:style>
    <style:style style:name="T1646" style:family="text">
      <style:text-properties officeooo:rsid="07613d41"/>
    </style:style>
    <style:style style:name="T1647" style:family="text">
      <style:text-properties officeooo:rsid="07004e12"/>
    </style:style>
    <style:style style:name="T1648" style:family="text">
      <style:text-properties officeooo:rsid="07013b5c"/>
    </style:style>
    <style:style style:name="T1649" style:family="text">
      <style:text-properties style:text-underline-style="none" officeooo:rsid="06c0ba31" style:font-style-asian="normal" style:font-weight-asian="normal" style:font-style-complex="normal" style:font-weight-complex="normal"/>
    </style:style>
    <style:style style:name="T1650" style:family="text">
      <style:text-properties fo:font-style="italic" style:text-underline-style="none" officeooo:rsid="06c0ba31" style:font-style-asian="italic" style:font-weight-asian="normal" style:font-style-complex="italic" style:font-weight-complex="normal"/>
    </style:style>
    <style:style style:name="T1651" style:family="text">
      <style:text-properties officeooo:rsid="06c0ba31"/>
    </style:style>
    <style:style style:name="T1652" style:family="text">
      <style:text-properties fo:font-style="normal" officeooo:rsid="06c5b8ad" style:font-style-asian="normal" style:font-style-complex="normal"/>
    </style:style>
    <style:style style:name="T1653" style:family="text">
      <style:text-properties officeooo:rsid="06c5b8ad"/>
    </style:style>
    <style:style style:name="T1654" style:family="text">
      <style:text-properties officeooo:rsid="06c55e4f"/>
    </style:style>
    <style:style style:name="T1655" style:family="text">
      <style:text-properties fo:font-style="italic" officeooo:rsid="06c08b39" style:font-style-asian="italic" style:font-style-complex="italic"/>
    </style:style>
    <style:style style:name="T1656" style:family="text">
      <style:text-properties fo:font-style="normal" style:text-underline-style="none" fo:font-weight="normal" officeooo:rsid="06d399e2" style:font-style-asian="normal" style:font-weight-asian="normal" style:font-style-complex="normal" style:font-weight-complex="normal"/>
    </style:style>
    <style:style style:name="T1657" style:family="text">
      <style:text-properties officeooo:rsid="06d399e2"/>
    </style:style>
    <style:style style:name="T1658" style:family="text">
      <style:text-properties fo:font-style="normal" style:text-underline-style="none" fo:font-weight="normal" officeooo:rsid="06bf3506" style:font-style-asian="normal" style:font-weight-asian="normal" style:font-style-complex="normal" style:font-weight-complex="normal"/>
    </style:style>
    <style:style style:name="T1659" style:family="text">
      <style:text-properties officeooo:rsid="06dbdfa2"/>
    </style:style>
    <style:style style:name="T1660" style:family="text">
      <style:text-properties officeooo:rsid="06d70e0d"/>
    </style:style>
    <style:style style:name="T1661" style:family="text">
      <style:text-properties fo:font-style="italic" officeooo:rsid="06d70e0d" style:font-style-asian="italic" style:font-style-complex="italic"/>
    </style:style>
    <style:style style:name="T1662" style:family="text">
      <style:text-properties fo:font-style="normal" officeooo:rsid="06d70e0d" style:font-style-asian="normal" style:font-style-complex="normal"/>
    </style:style>
    <style:style style:name="T1663" style:family="text">
      <style:text-properties fo:font-style="italic" officeooo:rsid="06da7990" style:font-style-asian="italic" style:font-style-complex="italic"/>
    </style:style>
    <style:style style:name="T1664" style:family="text">
      <style:text-properties officeooo:rsid="06c3b81c"/>
    </style:style>
    <style:style style:name="T1665" style:family="text">
      <style:text-properties fo:font-style="italic" officeooo:rsid="06c3b81c" style:font-style-asian="italic" style:font-style-complex="italic"/>
    </style:style>
    <style:style style:name="T1666" style:family="text">
      <style:text-properties officeooo:rsid="06c82ed8"/>
    </style:style>
    <style:style style:name="T1667" style:family="text">
      <style:text-properties officeooo:rsid="0863c95e"/>
    </style:style>
    <style:style style:name="T1668" style:family="text">
      <style:text-properties officeooo:rsid="086ef025"/>
    </style:style>
    <style:style style:name="T1669" style:family="text">
      <style:text-properties style:font-name="Bukyvede" officeooo:rsid="08a8c6fa"/>
    </style:style>
    <style:style style:name="T1670" style:family="text">
      <style:text-properties officeooo:rsid="08650f14"/>
    </style:style>
    <style:style style:name="T1671" style:family="text">
      <style:text-properties officeooo:rsid="0864db48"/>
    </style:style>
    <style:style style:name="T1672" style:family="text">
      <style:text-properties style:font-name="Bukyvede" style:font-name-asian="Bukyvede" style:font-name-complex="Bukyvede"/>
    </style:style>
    <style:style style:name="T1673" style:family="text">
      <style:text-properties style:font-name="Bukyvede" officeooo:rsid="08a8c6fa" style:font-name-asian="Bukyvede" style:font-name-complex="Bukyvede"/>
    </style:style>
    <style:style style:name="T1674"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ext:soft-page-break/>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text:soft-page-break/></text:p>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text:span></text:p>
      <text:p text:style-name="P163"><text:span text:style-name="T1452">In </text:span><text:span text:style-name="T1453">other cases we are dealing with hodge-podge paradigms which are only ever attested with endings from multiple older classes, </text:span><text:span text:style-name="T1454">and sometimes </text:span><text:span text:style-name="T1455">dialectal or orthographic features of the manuscripts can make it difficult to </text:span><text:span text:style-name="T1454">distinguish potential</text:span><text:span text:style-name="T1455"> </text:span><text:span text:style-name="T1454">LCS ancestors of certain endings</text:span><text:span text:style-name="T1455">.</text:span><text:span text:style-name="T1456"> </text:span><text:span text:style-name="T1455">For instance, </text:span><text:span text:style-name="T1457">I have a </text:span><text:span text:style-name="T1458">masc_tel</text:span><text:span text:style-name="T1459"> </text:span><text:span text:style-name="T1457">class used for agent-nouns like OCS </text:span><text:span text:style-name="T1460">дѣлател҄ь</text:span><text:span text:style-name="T1457"> </text:span><text:span text:style-name="T1461">(</text:span><text:span text:style-name="T1462">i</text:span><text:span text:style-name="T1461">.</text:span><text:span text:style-name="T1462">e.</text:span><text:span text:style-name="T1461"> Diels 1963: 166),</text:span><text:span text:style-name="T1457"> </text:span><text:span text:style-name="T1463">which in the sg. and dual. behave exactly like masc jo-stems, but which in the</text:span><text:span text:style-name="T1464"> </text:span><text:span text:style-name="T1463">gen. and instr. plural are attested </text:span><text:span text:style-name="T1465">also </text:span><text:span text:style-name="T1463">with </text:span><text:span text:style-name="T1466">basically consonant-stem endings on a hard *‑tel‑ stem, e.g. </text:span><text:span text:style-name="T1467">Zogr</text:span><text:span text:style-name="T1466">. </text:span><text:a xlink:type="simple" xlink:href="https://ocstexts.co.uk/texts?222129" text:style-name="Internet_20_link" text:visited-style-name="Visited_20_Internet_20_Link"><text:span text:style-name="T1468">ⱅⱔⰶⰰⱅⰵ</text:span><text:span text:style-name="T1469">ⰾⱏ</text:span></text:a><text:span text:style-name="T1470"> </text:span><text:span text:style-name="T1471">{</text:span><text:span text:style-name="T1472">tɴžatelŭ</text:span><text:span text:style-name="T1471">} </text:span><text:span text:style-name="T1466">&lt;</text:span><text:span text:style-name="T1473">*</text:span><text:span text:style-name="T1467">tęžǢte</text:span><text:span text:style-name="T1474">lъ</text:span><text:span text:style-name="T1473">,</text:span><text:span text:style-name="T1466"> Supr. </text:span><text:a xlink:type="simple" xlink:href="https://ocstexts.co.uk/texts?129979" text:style-name="Internet_20_link" text:visited-style-name="Visited_20_Internet_20_Link"><text:span text:style-name="T1470">свꙙтите</text:span><text:span text:style-name="T1475">лꙑ</text:span></text:a><text:span text:style-name="T1466"> &lt;</text:span><text:span text:style-name="T1473">*svętite</text:span><text:span text:style-name="T1476">ly</text:span><text:span text:style-name="T1473">. </text:span><text:span text:style-name="T1455">The nom. pl. </text:span><text:span text:style-name="T1454">appears also to take</text:span><text:span text:style-name="T1455"> a consonant-stem *</text:span><text:span text:style-name="T1401">‑</text:span><text:span text:style-name="T1455">e </text:span><text:span text:style-name="T1454">ending</text:span><text:span text:style-name="T1455">, </text:span><text:span text:style-name="T1461">but as Diels (op. cit.) points out, </text:span><text:span text:style-name="T1477">the spellings in Zogr. and Supr.</text:span><text:span text:style-name="T1478"> </text:span><text:span text:style-name="T1477">(where use of the palatalisation-diacritic &lt;</text:span><text:span text:style-name="T1479"> ҄ </text:span><text:span text:style-name="T1477">&gt; to denote LCS *ĺ is consistent enough </text:span><text:span text:style-name="T1480">to</text:span><text:span text:style-name="T1477"> suggest a real phonemic /ĺ/ in the underlying dialects) like </text:span><text:a xlink:type="simple" xlink:href="https://ocstexts.co.uk/texts?167734" text:style-name="Internet_20_link" text:visited-style-name="Visited_20_Internet_20_Link"><text:span text:style-name="T1479">мѫчител҄е</text:span></text:a><text:span text:style-name="T1477"><text:note text:id="ftn30" text:note-class="footnote"><text:note-citation>30</text:note-citation><text:note-body><text:p text:style-name="P164">Searching my database for *teĺe$ <text:span text:style-name="T1481">returns</text:span><text:span text:style-name="T1482"> only a single </text:span><text:a xlink:type="simple" xlink:href="https://ocstexts.co.uk/texts?147673" text:style-name="Internet_20_link" text:visited-style-name="Visited_20_Internet_20_Link"><text:span text:style-name="T1483">властеле</text:span></text:a><text:span text:style-name="T1484"> </text:span><text:span text:style-name="T1485">in Supr. without the diacritic; everything in Zogr. has it.</text:span></text:p></text:note-body></text:note></text:span><text:span text:style-name="T1477"> mean we can’t follow Meillet (1965: 426) </text:span><text:span text:style-name="T1480">in setting up *‑tele as the ‘correct’ ending, </text:span><text:span text:style-name="T1486">because spellings like</text:span><text:span text:style-name="T1487"> </text:span><text:a xlink:type="simple" xlink:href="https://ocstexts.co.uk/texts?7881" text:style-name="Internet_20_link" text:visited-style-name="Visited_20_Internet_20_Link"><text:span text:style-name="T1488">ⰶⱔⱅⰵⰾⰵ</text:span></text:a><text:span text:style-name="T1486"> </text:span><text:span text:style-name="T1489">{</text:span><text:span text:style-name="T1472">žɴtele</text:span><text:span text:style-name="T1489">}</text:span><text:span text:style-name="T1471"> </text:span><text:span text:style-name="T1486">in Mar. could just as easily descend from *žęteĺe as from *žętele</text:span><text:span text:style-name="T1490">.</text:span><text:span text:style-name="T1486"> </text:span><text:span text:style-name="T1490">A</text:span><text:span text:style-name="T1491">bsent a manuscript which both consistently marks *ĺ </text:span><text:span text:style-name="T1492">and</text:span><text:span text:style-name="T1491"> doesn’t use such </text:span><text:span text:style-name="T1493">a </text:span><text:span text:style-name="T1491">mark in this nom. pl. desinence, there’s </text:span><text:span text:style-name="T1494">no hard evidence of this *‑tele ending ever</text:span><text:span text:style-name="T1478"> actually</text:span><text:span text:style-name="T1494"> existing. I thus use *‑teĺe in the ‘correct’ table, and the jo-stem *‑teĺi in the ‘deviances’ table</text:span><text:span text:style-name="T1494"><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5">ⱄⱏⰲⱑⰴⱑⱅⰵ</text:span><text:span text:style-name="T431">ⰾⰹ</text:span></text:a><text:span text:style-name="T1496"> {</text:span><text:span text:style-name="T1320">sŭvědětelı</text:span><text:span text:style-name="T1496">}, </text:span>but the Autoreconstructor is intended for use with other early texts beyond canonical OCS which might <text:span text:style-name="T1497">also contain this type of </text:span><text:span text:style-name="T1498">assimilation to the jo-stems</text:span><text:span text:style-name="T1497">.</text:span> </text:p></text:note-body></text:note></text:span><text:span text:style-name="T1499">.</text:span></text:p>
      <text:p text:style-name="P165"/>
      <text:p text:style-name="P166"><text:span text:style-name="T1500">2.4 </text:span><text:span text:style-name="T1501">Overcoming</text:span> <text:span text:style-name="T1502">poor </text:span>lemmatisation <text:span text:style-name="T1502">practice</text:span></text:p>
      <text:p text:style-name="P167"/>
      <text:p text:style-name="P168"><text:span text:style-name="T1503">Sometimes Eckhoff's lemmatisation is too coarse-grained</text:span><text:span text:style-name="T1504">, in that forms which clearly descend from distinct doublets are subsumed under one lemma.</text:span><text:span text:style-name="T1505"> </text:span><text:span text:style-name="T1506">To demonstrate just</text:span><text:span text:style-name="T1505"> one example of how the Autoreconstructor deal</text:span><text:span text:style-name="T1507">s</text:span><text:span text:style-name="T1505"> with this</text:span><text:span text:style-name="T1508"> sort of problem</text:span><text:span text:style-name="T1509">, </text:span><text:span text:style-name="T1510">take</text:span><text:span text:style-name="T1509"> the numeral </text:span><text:span text:style-name="T1511">ѥдинъ</text:span><text:span text:style-name="T1509"> &lt;*jedinъ, which in </text:span><text:span text:style-name="T1507">the earliest </text:span><text:span text:style-name="T1509">OCS </text:span><text:span text:style-name="T1512">has</text:span><text:span text:style-name="T1509"> </text:span><text:span text:style-name="T1513">straightforward </text:span><text:span text:style-name="T1509">hard pronominal endings </text:span><text:span text:style-name="T1513">and which therefore goes in my </text:span><text:span text:style-name="T1514">pron_hard</text:span><text:span text:style-name="T1515"> class alongside demonstratives like *onъ</text:span><text:span text:style-name="T1509">. There is, however, what must be viewed as an LCS doublet *jedьnъ</text:span><text:span text:style-name="T1509"><text:note text:id="ftn32" text:note-class="footnote"><text:note-citation>32</text:note-citation><text:note-body><text:p text:style-name="P169"><text:span text:style-name="T1516">This d</text:span><text:span text:style-name="T1517">espite</text:span><text:span text:style-name="T1513"> Meillet's (1965: 144) incoherent speculation about th</text:span><text:span text:style-name="T1517">e</text:span><text:span text:style-name="T1518"> /i/ in</text:span><text:span text:style-name="T1517"> *jed</text:span><text:span text:style-name="T1519">i</text:span><text:span text:style-name="T1517">nъ</text:span><text:span text:style-name="T1518"> </text:span><text:span text:style-name="T1517">resulting from</text:span><text:span text:style-name="T1520"> a</text:span><text:span text:style-name="T1521"> phonetic development of</text:span><text:span text:style-name="T1520"> strong *ь,</text:span><text:span text:style-name="T1522"> analogous to </text:span><text:span text:style-name="T1521">what happens in the</text:span><text:span text:style-name="T1522"> vicinity of *j</text:span><text:span text:style-name="T1520">, because "</text:span><text:span text:style-name="T1523">or il s'agit d'un compos</text:span><text:span text:style-name="T1524">é</text:span><text:span text:style-name="T1525"> dont le second </text:span><text:span text:style-name="T1524">élément </text:span><text:span text:style-name="T1526">est</text:span><text:span text:style-name="T1527"> </text:span><text:span text:style-name="T1526">*j</text:span><text:span text:style-name="T1528">ĭnŭ"</text:span><text:span text:style-name="T1529">. </text:span><text:span text:style-name="T1530">While this interpretation of *jedinъ’s derivation could be true (and according to Derksen’s (200</text:span><text:span text:style-name="T1531">8</text:span><text:span text:style-name="T1530">: 212) etymology of the</text:span><text:span text:style-name="T1532"> </text:span><text:span text:style-name="T1530">*jьnъ pronoun, its </text:span><text:span text:style-name="T1533">*j</text:span><text:span text:style-name="T1530"> is prothetic, meaning it wouldn’t develop if </text:span><text:span text:style-name="T1534">already </text:span><text:span text:style-name="T1530">attached to a stem ending in *d), the idea that a </text:span><text:span text:style-name="T1535">synchronic </text:span><text:span text:style-name="T1530">*‑dьnъ </text:span><text:span text:style-name="T1535">by any purely phonological means could become /‑din/, let alone early enough to completely displace by analogy the oblique forms in the earliest OCS where </text:span><text:span text:style-name="T1536">ⰵⰴⰻⱀ</text:span><text:span text:style-name="T1535">‑ </text:span><text:span text:style-name="T1537">{</text:span><text:span text:style-name="T1538">edin‑</text:span><text:span text:style-name="T1537">} </text:span><text:span text:style-name="T1535">spellings are overwhelming, is ludicrous </text:span><text:span text:style-name="T1539">and contradicted by all the philological evidence.</text:span><text:span text:style-name="T1535"> </text:span><text:span text:style-name="T1530"><text:s/></text:span><text:span text:style-name="T1540"><text:s text:c="2"/></text:span><text:span text:style-name="T1541"><text:s/></text:span></text:p></text:note-body></text:note></text:span><text:span text:style-name="T1509">, </text:span><text:span text:style-name="T1542">which gives e.g. Serbian </text:span><text:span text:style-name="T1543">jedan </text:span><text:span text:style-name="T1544">and the</text:span><text:span text:style-name="T1509"> modern Russian</text:span><text:span text:style-name="T1542"> </text:span><text:span text:style-name="T1509">fem. nt. and oblique-case forms </text:span><text:span text:style-name="T1545">одна, одного</text:span><text:span text:style-name="T1546"> etc.</text:span><text:span text:style-name="T1544">, </text:span><text:span text:style-name="T1547">and which is </text:span><text:span text:style-name="T1548">used for the majority of non masc. nom./acc. sg. </text:span><text:soft-page-break/><text:span text:style-name="T1548">forms of the pronoun in Suprasliens</text:span><text:span text:style-name="T1549">is</text:span><text:span text:style-name="T1548"><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0">Interestingly the Uspenskij Sbornik </text:span><text:span text:style-name="T1551">(at least the parts included in TOROT)</text:span><text:span text:style-name="T1550">, in contrast to later Russian, appears to completely lack *jedьn‑, though all except the single </text:span><text:a xlink:type="simple" xlink:href="http://ocstexts.co.uk:7300/texts?245701" text:style-name="Internet_20_link" text:visited-style-name="Visited_20_Internet_20_Link"><text:span text:style-name="T1552">одинои</text:span></text:a><text:span text:style-name="T1550"> </text:span><text:span text:style-name="T1553">are spelt with</text:span><text:span text:style-name="T1554"> the OCS &lt;</text:span><text:span text:style-name="T1555">ѥ</text:span><text:span text:style-name="T1554">/</text:span><text:span text:style-name="T1556">е</text:span><text:span text:style-name="T1553">&gt; </text:span><text:span text:style-name="T1557">reflex of intial *je‑.</text:span></text:p></text:note-body></text:note></text:span><text:span text:style-name="T1548">, </text:span><text:span text:style-name="T1558">e.g.</text:span><text:span text:style-name="T1559"> </text:span><text:a xlink:type="simple" xlink:href="https://ocstexts.co.uk/texts?102024" text:style-name="Internet_20_link" text:visited-style-name="Visited_20_Internet_20_Link"><text:span text:style-name="T1511">ѥдʼномоу</text:span></text:a><text:span text:style-name="T1560">. </text:span><text:span text:style-name="T1561">Notwithstanding</text:span><text:span text:style-name="T1562"> Eckhoff’s </text:span><text:span text:style-name="T1563">habit of</text:span><text:span text:style-name="T1562"> lemmatis</text:span><text:span text:style-name="T1563">ing</text:span><text:span text:style-name="T1562"> these with </text:span><text:span text:style-name="T1564">ѥдинъ </text:span><text:span text:style-name="T1565">instead of </text:span><text:span text:style-name="T1566">ѥд</text:span><text:span text:style-name="T1567">ь</text:span><text:span text:style-name="T1566">нъ</text:span><text:span text:style-name="T1568">, it’s trivial </text:span><text:span text:style-name="T1569">for the Autoreconstructor </text:span><text:span text:style-name="T1568">to check the form (which has in a previous step already been aggressively normalised to get rid of morphologically-irrelevant variation) for </text:span><text:span text:style-name="T1570">a &lt;</text:span><text:span text:style-name="T1571">дін</text:span><text:span text:style-name="T1570">&gt; sequence, which would never occur in the infle</text:span><text:span text:style-name="T1572">ct</text:span><text:span text:style-name="T157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73">but </text:span><text:span text:style-name="T1574">in the meantime checks like the above are computationally </text:span><text:span text:style-name="T1575">extremely</text:span><text:span text:style-name="T1576"> </text:span><text:span text:style-name="T1575">cheap</text:span><text:span text:style-name="T1574"> and </text:span><text:span text:style-name="T1577">prevent great swathes of the texts from being wrongly </text:span><text:span text:style-name="T1578">auto</text:span><text:span text:style-name="T1577">reconstructed.</text:span></text:p>
      <text:p text:style-name="P172"/>
      <text:p text:style-name="P173">3. Benefits and potential for future studies</text:p>
      <text:p text:style-name="P174"/>
      <text:p text:style-name="P174">- maybe use the брьние in Psal. example as one extra toy example</text:p>
      <text:p text:style-name="P174">- <text:span text:style-name="T1579">regex for all consonants: [tŕrpsšdfgћђklĺzžxčvbnńmḱx́ǵǯj]</text:span></text:p>
      <text:p text:style-name="P174"/>
      <text:p text:style-name="P174">- <text:span text:style-name="T1580">unexpected things come to light when you have reconstructions produced by the rigorous and consisent computer, for example, in words like Assem. long-form gen. pl. въшедъшиӣхъ</text:span> &lt;<text:span text:style-name="T1580">*</text:span>vъšьdъšьjixъ, <text:span text:style-name="T1580">the &lt;иихъ&gt; ending must etymologically consist of the short-form *ь desinence plus the gen. pl. form of the pronoun *jь, viz. *jixъ. </text:span><text:span text:style-name="T1581">G</text:span><text:span text:style-name="T1580">iven a following /j/ does not generally </text:span><text:span text:style-name="T1582">alter the action of Havlik’s Law (e.g. Psal. Sin. Денье https://ocstexts.co.uk/texts?90375 &lt; *dьnьje vs. днеі </text:span><text:a xlink:type="simple" xlink:href="https://ocstexts.co.uk/texts?81775" text:style-name="Internet_20_link" text:visited-style-name="Visited_20_Internet_20_Link"><text:span text:style-name="T1582">https://ocstexts.co.uk/texts?81775</text:span></text:a><text:span text:style-name="T1582"> &lt;*dьnьjь, </text:span><text:span text:style-name="T1581">Mar. безакон</text:span><text:span text:style-name="T1583">е</text:span><text:span text:style-name="T1581">ние </text:span><text:a xlink:type="simple" xlink:href="https://ocstexts.co.uk/texts?7912" text:style-name="Internet_20_link" text:visited-style-name="Visited_20_Internet_20_Link"><text:span text:style-name="T1581">https://ocstexts.co.uk/texts?7912</text:span></text:a><text:span text:style-name="T1581"> &lt;*bezakonьnьje</text:span><text:span text:style-name="T1584">), the vocalised &lt;е&gt; here should be in weak-position (i.e. we’d expect &lt;вошдошихъ&gt;).</text:span></text:p>
      <text:p text:style-name="P174"/>
      <text:p text:style-name="P174">- <text:span text:style-name="T1585">reflex of *ʒ in Assem: PV3 regex [ьię]g[aǫu], PV2 regex gv?(?:[ěęeiь]|ŕ̥|ĺ̥) - </text:span><text:span text:style-name="T1586">absolutely flawless preservation of ⰷ; only indication of its loss is extension to проѕѧбе </text:span><text:a xlink:type="simple" xlink:href="https://ocstexts.co.uk/texts?260966" text:style-name="Internet_20_link" text:visited-style-name="Visited_20_Internet_20_Link"><text:span text:style-name="T1586">https://ocstexts.co.uk/texts?260966</text:span></text:a><text:span text:style-name="T1586"> </text:span><text:span text:style-name="T1587">and проѕѧбнетъ </text:span><text:a xlink:type="simple" xlink:href="https://ocstexts.co.uk/texts?265045" text:style-name="Internet_20_link" text:visited-style-name="Visited_20_Internet_20_Link"><text:span text:style-name="T1587">https://ocstexts.co.uk/texts?265045</text:span></text:a><text:span text:style-name="T1587">, </text:span><text:span text:style-name="T1588">but Derksen’s (2008: 543) entry on the *zęb- root </text:span></text:p>
      <text:p text:style-name="P174"><text:s/></text:p>
      <text:p text:style-name="P175"/>
      <text:p text:style-name="P172"/>
      <text:p text:style-name="P176">3. Conclusion and<text:span text:style-name="T1589"> </text:span><text:span text:style-name="T1590">prospects</text:span><text:span text:style-name="T1589"> for future work</text:span></text:p>
      <text:p text:style-name="P177"><text:span text:style-name="T1591">T</text:span><text:span text:style-name="T1592">he foregoing article has laid out a method for </text:span><text:span text:style-name="T1593">leveraging existing morphosyntactic annotation-data to produce rigorous phonological annotations of Old Church Slavonic texts, and in so doing to make the results of large-scale corpus-building efforts like PROIEL and TOROT </text:span><text:span text:style-name="T1594">directly </text:span><text:span text:style-name="T1593">useful to historical phonologists, morphologists, and textologists, </text:span><text:span text:style-name="T1595">rather than just to </text:span><text:span text:style-name="T1596">the syntacticians, semanticists and pragmaticians these resources were </text:span><text:span text:style-name="T1597">primarily </text:span><text:span text:style-name="T1596">created for</text:span><text:span text:style-name="T1595">.</text:span><text:span text:style-name="T1591"> </text:span><text:span text:style-name="T1593">Both the resulting annotations and the computational apparatus used to produce them have </text:span>value not only for researchers, but <text:span text:style-name="T1593">also </text:span><text:span text:style-name="T1598">in their</text:span> potential for <text:span text:style-name="T1598">creating innovative</text:span> pedagogical tool<text:span text:style-name="T1598">s for learners</text:span><text:span text:style-name="T1599">. </text:span></text:p>
      <text:p text:style-name="P178"><text:soft-page-break/>- in many ways <text:span text:style-name="T1600">the point of </text:span><text:span text:style-name="T1601">what I propose here </text:span>is <text:span text:style-name="T1600">simply </text:span><text:span text:style-name="T1601">to</text:span><text:span text:style-name="T1600"> </text:span><text:span text:style-name="T1602">make maximally accessible and applicable for manuscript-investigators the</text:span><text:span text:style-name="T1600"> knowledge already accumulated by the nearly two centuries of serious </text:span><text:span text:style-name="T1603">Slavonic </text:span><text:span text:style-name="T1600">scholarship</text:span><text:span text:style-name="T1602">:</text:span><text:span text:style-name="T1603"> the sum of our etymological knowledge (as distilled in etymological dictionaries like Derksen (2008) and the ESSJa) </text:span><text:span text:style-name="T1602">combined </text:span><text:span text:style-name="T1603">with what we know about Common Slavonic phonology and morphology, and then bringing this to bear directly on the philological evidence, so that investigators of the latter have at their fingertips</text:span></text:p>
      <text:p text:style-name="P177"/>
      <text:p text:style-name="P179">We have already seen a few examples of minor questions where recourse to the LCS reconstructed layer makes exhaustive investigation trivial<text:span text:style-name="T1604">:</text:span> e.g. <text:span text:style-name="T1605">regarding</text:span><text:span text:style-name="T1606"> </text:span>the reality of a difference between word-intial <text:span text:style-name="T1607">/je‑/</text:span> and (foreign) <text:span text:style-name="T1607">/e‑/</text:span> in the Codex Suprasliensis <text:span text:style-name="T1608">shown by discrimination in use of the &lt;</text:span><text:span text:style-name="T1609">ѥ</text:span><text:span text:style-name="T1608">&gt; letter</text:span><text:span text:style-name="T1605"> </text:span>(p.9-10)<text:span text:style-name="T1608">, or the </text:span><text:span text:style-name="T1606">fate</text:span><text:span text:style-name="T1608"> </text:span><text:span text:style-name="T1606">of </text:span><text:span text:style-name="T1608">the P</text:span><text:span text:style-name="T1610">V3 reflexes *ś and *ʒ </text:span><text:span text:style-name="T1606">and wheth</text:span><text:span text:style-name="T1604">e</text:span><text:span text:style-name="T1606">r they</text:span><text:span text:style-name="T1605"> harden and merge with plain /s z/ or</text:span><text:span text:style-name="T1606"> </text:span><text:span text:style-name="T1610">bec</text:span><text:span text:style-name="T1605">o</text:span><text:span text:style-name="T1610">me patalised counterparts to plain /s z/, </text:span><text:span text:style-name="T1110">i.e. /s’ z’/</text:span><text:span text:style-name="T1605">,</text:span><text:span text:style-name="T1604"> </text:span><text:span text:style-name="T1605">as in East Slavic (fn. 19).</text:span><text:span text:style-name="T1611"> Questions where</text:span><text:span text:style-name="T1612"> there are simply too many data-points for </text:span><text:span text:style-name="T1593">exhaustive </text:span><text:span text:style-name="T1612">manual investigation</text:span><text:span text:style-name="T1613">s</text:span><text:span text:style-name="T1612"> to be feasible</text:span><text:span text:style-name="T1611">, such as those concerning the jers, are another good candidate: </text:span><text:span text:style-name="T1614">Lunt (1952: 322-5)</text:span><text:span text:style-name="T1615"> adduces data</text:span><text:span text:style-name="T1616"> he manually gathered</text:span><text:span text:style-name="T1615"> from "about half the manuscript" of Zographensis to try to shed light on the long-standing controversy</text:span><text:span text:style-name="T1616"> surrounding the reasons for</text:span><text:span text:style-name="T1617"> this manuscript's</text:span><text:span text:style-name="T1616"> mixing</text:span><text:span text:style-name="T1618">-</text:span><text:span text:style-name="T1616">up of </text:span><text:span text:style-name="T1618">weak jers, which Jagić (1876) viewed as an assimilation to the front/backness of the vowel in the following syllable</text:span><text:span text:style-name="T1619"> occurring in a pre-</text:span><text:span text:style-name="T1618">Jer Shift</text:span><text:span text:style-name="T1619"> ancestor-dialect underlying (a protograph of?) Zogr.</text:span><text:span text:style-name="T1620"> Lunt's statistics broadly support </text:span><text:span text:style-name="T1618">Jagić</text:span><text:span text:style-name="T1617">'s</text:span><text:span text:style-name="T1620"> "Jer Umlaut" theory, but since he only gives rough percentages </text:span><text:span text:style-name="T1621">and we don't have the exact data he draws them from, we </text:span><text:span text:style-name="T1617">have no way of verifying it ourselves. </text:span><text:span text:style-name="T1622">Having each word indexed by its LCS phonemes allows all instances of a weak-jer to be searched for, whether the scribe has omitted them or not</text:span></text:p>
      <text:p text:style-name="P180">- It's true that Leskien's (1905) articles on the jers <text:span text:style-name="T1623">give exhaustive statistics, but </text:span><text:s/></text:p>
      <text:p text:style-name="P181"/>
      <text:p text:style-name="P182">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3"/>
      <text:p text:style-name="P183"><text:span text:style-name="T1605">B</text:span>ut the <text:span text:style-name="T1607">largest benefit</text:span> <text:span text:style-name="T1607">of </text:span><text:span text:style-name="T1624">the type of annotation proposed here</text:span><text:span text:style-name="T1607"> </text:span>would be felt in questions of a more systematic and holistic nature, where <text:span text:style-name="T1625">cross-referencing of multiple orthographic (and potentially also morphological) features </text:span><text:span text:style-name="T1626">must be undertaken to corroborate hypotheses. </text:span><text:span text:style-name="T1627">T</text:span><text:span text:style-name="T1626">he extremely important issue of the development of phonemic secondary consonant-palatalisation before various LCS front-vowels,</text:span><text:span text:style-name="T1627"> for example,</text:span><text:span text:style-name="T1626"> which is a critical isogloss in both Bulgaro-Macedonian and East Slavic,</text:span><text:span text:style-name="T1627"> </text:span></text:p>
      <text:p text:style-name="P184"/>
      <text:p text:style-name="P184"/>
      <text:p text:style-name="P184"><text:span text:style-name="T1612">or of the theor</text:span><text:span text:style-name="T1628">y</text:span><text:span text:style-name="T1612"> advanced by Totomanova (2014</text:span><text:span text:style-name="T1628">: 14-28</text:span><text:span text:style-name="T1612">) about a purported merger of the jers in </text:span><text:span text:style-name="T1628">the </text:span><text:span text:style-name="T1612">earl</text:span><text:span text:style-name="T1628">iest</text:span><text:span text:style-name="T1612"> Bulgarian after palatal and palatalised consonants</text:span><text:span text:style-name="T1628">, parallel to the better-known Middle Bulgarian merger of the nasals in the same </text:span><text:span text:style-name="T1629">environment</text:span><text:span text:style-name="T1612">.</text:span><text:span text:style-name="T1630">, </text:span></text:p>
      <text:p text:style-name="P185"/>
      <text:p text:style-name="P186"><text:span text:style-name="T1631">How, for instance, could one search for the reflexes of LCS *ŕ ń ĺ in isolation, in order to compare such spellings with those of plain LCS *r, *n, *l plus front-vowel, </text:span><text:span text:style-name="T1632">based purely on surface-spellings, when</text:span></text:p>
      <text:list text:style-name="L3">
        <text:list-item>
          <text:p text:style-name="P187">Reference to Shevelov's Konsonant vor e, i in </text:p>
        </text:list-item>
      </text:list>
      <text:p text:style-name="P188"/>
      <text:p text:style-name="P189">Though important OCS <text:span text:style-name="T1633">and Old East Slavic</text:span> texts are still lacking the sort of annotation-data needed for the method of autoreconstruction outlined here, it should be noted that <text:span text:style-name="T1634">recent advances in neural-network-based tagging and lemmatisation</text:span><text:span text:style-name="T1635"> </text:span><text:span text:style-name="T1634">(</text:span><text:span text:style-name="T1635">e.g. Rabus &amp; Besters-Dilger 2021</text:span><text:span text:style-name="T1634">) mean that modern taggers trained on the existing manual</text:span><text:span text:style-name="T1636">ly</text:span><text:span text:style-name="T1635">-annotated corpus will perform extremely well on the remaining canonical OCS texts, which massively cuts down the time and effort required to do </text:span><text:soft-page-break/><text:span text:style-name="T1635">for, say, the Sav</text:span><text:span text:style-name="T1637">v</text:span><text:span text:style-name="T1635">ina Kniga what has already been done for the Marianus</text:span><text:span text:style-name="T1635"><text:note text:id="ftn34" text:note-class="footnote"><text:note-citation>34</text:note-citation><text:note-body><text:p text:style-name="P190">The Codex Assemanianus (Cyrillicised from Jouko Lindstedt's ASCII-encoded version) is included on ocstexts.co.uk with a wholly automatic lemmatisation, tagging, and autoreconstruction that used a (slightly improved<text:span text:style-name="T1638"> </text:span>version of<text:span text:style-name="T1638">)</text:span> the outdated method detailed in Berdičeviskis, Eckhoff &amp; Gavrilova (2016), <text:span text:style-name="T1638">and as shoddy as the autoreconstructions often are one can still glean useful insights from searching around in it</text:span><text:span text:style-name="T1639">.</text:span></text:p></text:note-body></text:note></text:span><text:span text:style-name="T1635">. </text:span><text:span text:style-name="T1640">As the volume and quality of training-data increases, the performance of such automatic taggers can only improve, </text:span><text:span text:style-name="T1591">which will open up more and more </text:span><text:span text:style-name="T1641">of the early Slavic written record</text:span><text:span text:style-name="T1591"> to </text:span><text:span text:style-name="T1642">the sort of </text:span><text:span text:style-name="T1591">automatic phonological annotation</text:span><text:span text:style-name="T1642"> described here.</text:span></text:p>
      <text:p text:style-name="P191"/>
      <text:p text:style-name="P192"/>
      <text:p text:style-name="P193">References</text:p>
      <text:p text:style-name="P194"/>
      <text:p text:style-name="P194">Berdičevskis, A., Eckhoff, H., &amp; Gavrilova, T. (2016). The beginning of a beautiful friendship:</text:p>
      <text:p text:style-name="P194">Rulebased and statistical analysis of Middle Russian. In <text:span text:style-name="T421">Computational linguistics and intellectual</text:span></text:p>
      <text:p text:style-name="P194"><text:span text:style-name="T421">technologies. Proceedings of Dialogue 16</text:span>. Moscow.</text:p>
      <text:p text:style-name="P194"/>
      <text:p text:style-name="P195">Bethin, Christina. 1998. <text:span text:style-name="T421">Slavic prosody: Language change and phonological theory.</text:span><text:span text:style-name="T453"> New York.</text:span></text:p>
      <text:p text:style-name="P196"/>
      <text:p text:style-name="P197">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43">.</text:span></text:p>
      <text:p text:style-name="P197"/>
      <text:p text:style-name="P196">Derksen, Rick. 2008. <text:span text:style-name="T1644">Etymological Dictionary of the Slavic Inherited Lexicon.</text:span><text:span text:style-name="T1645"> Leiden.</text:span></text:p>
      <text:p text:style-name="P196"/>
      <text:p text:style-name="P197">Diels, Paul. 1963. <text:span text:style-name="T421">Altkirchenslavische Grammatik</text:span>. 2. Aufl. Heidelberg.</text:p>
      <text:p text:style-name="P197"/>
      <text:p text:style-name="P198">Durnovo, Nikolaj N.<text:span text:style-name="T1646"> 1929.</text:span> Mysli <text:span text:style-name="T1647">i</text:span> predpoloženija o proisxoždenii staroslavjanskogo jazyka <text:span text:style-name="T1648">i</text:span> slavjanskix alfavitov. <text:span text:style-name="T421">Byzantoslavica 1. </text:span>48-85.</text:p>
      <text:p text:style-name="P197"/>
      <text:p text:style-name="P199"><text:span text:style-name="T1649">Eckhoff, Hanne Martine &amp; Berdičevskis, Aleksandrs. 2015. Linguistics vs. digitial editions: The Tromsø Old Russian and OCS Treebank. </text:span><text:span text:style-name="T1650">Scripta &amp; e-Scripta 14-15.</text:span></text:p>
      <text:p text:style-name="P200"/>
      <text:p text:style-name="P201">Eckhoff, Hanne &amp; Bech, Kristin &amp; Bouma, Gerlof &amp; Eide, Kristine &amp; Haug, Dag &amp; Haugen, Odd Einar &amp; J<text:span text:style-name="T1651">ø</text:span>hndal, Marius. 2018. The PROIEL treebank family: a standard for early attestations of Indo-European languages<text:span text:style-name="T421">. Language Resources and Evaluation 52</text:span>. 29-65.</text:p>
      <text:p text:style-name="P200"/>
      <text:p text:style-name="P200"><text:span text:style-name="T453">Eckhoff, H.M.</text:span> <text:span text:style-name="T453">2015. Animacy and differential object marking in Old Church </text:span><text:span text:style-name="T1652">Slavonic. </text:span><text:span text:style-name="T1653">Russian Linguistics 39(2)</text:span><text:span text:style-name="T1652">, </text:span><text:span text:style-name="T1653">233-254</text:span><text:span text:style-name="T1652">.</text:span></text:p>
      <text:p text:style-name="P200"/>
      <text:p text:style-name="P202">Eckhoff, Hanne Martine. 2022. A Long-Haul Change: Differential Object Marking in Early Slavonic. <text:span text:style-name="T421">Journal of Historical Syntax, Volume 6, Article 8, 1-40</text:span>.</text:p>
      <text:p text:style-name="P202"/>
      <text:p text:style-name="P203">Haug, Dag T. T. <text:s/><text:span text:style-name="T1654">&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4"/>
      <text:p text:style-name="P205">Koch, Christoph. 1990. <text:span text:style-name="T421">Das Morphologische System des Altkirchenslavischen Verbums. I: Text.</text:span> München<text:span text:style-name="T421">.</text:span></text:p>
      <text:p text:style-name="P197"/>
      <text:p text:style-name="P197">Kortlandt, Frederik. 1979. On the history of the Slavic nasal vowels. <text:span text:style-name="T421">Indogermanische Forschungen</text:span> <text:span text:style-name="T421">84</text:span>. 259-272.</text:p>
      <text:p text:style-name="P197"/>
      <text:p text:style-name="P206"><text:soft-page-break/>Le Feuvre, Claire. 1993. The Sound Change e &gt; o in the Birchbark Letters of Novgorod and T. Fenne’s “Manual” and the N.sg m. Ending -e. <text:span text:style-name="T421">Harvard Ukrainian Studies 17(3/4)</text:span>. 219-250.</text:p>
      <text:p text:style-name="P197"/>
      <text:p text:style-name="P207">Mareš, F.V (ed.). 1997. <text:span text:style-name="T421">Psalterii Sinaitici pars nova: monasterii s. Catharinae codex slav. 2/N.</text:span> Wien.</text:p>
      <text:p text:style-name="P197"/>
      <text:p text:style-name="P197">Mathiesen, Robert. 2014. A new reconstruction of the original Glagolitic alphabet. In Flier, Michael S. &amp; Birnbaum, David J. &amp; Vakareliyska, Cynthia M. (eds.), <text:span text:style-name="T421">Philology broad and deep: In memoriam Horace G. Lunt</text:span>, 187–213. Bloomington.</text:p>
      <text:p text:style-name="P197"/>
      <text:p text:style-name="P197">Meillet, Antoine. 1965. <text:span text:style-name="T421">Le slave commun. Seconde édition revue et augmentée avec le concours A. Vaillant.</text:span> Paris</text:p>
      <text:p text:style-name="P197"/>
      <text:p text:style-name="P208">Nakonečnyj, Mykola F. 1962. Do vyvčennja procesu stanovlennja j rozvytku fonetyčnoï systemy ukraïnsʹkoï movy. In Bilodid, Ivan K. (ed.), <text:span text:style-name="T421">Pytannja istoryčnoho rozvytku ukraïnsʹkoï movy</text:span>, 125–165. Kharkiv.</text:p>
      <text:p text:style-name="P208"/>
      <text:p text:style-name="P202">Olander, Thomas. 2015. <text:span text:style-name="T421">Proto-Slavic Inflectional Morphology</text:span>. Leiden.</text:p>
      <text:p text:style-name="P208"><text:s/></text:p>
      <text:p text:style-name="P196">Schenker, Alexander M. 1995. <text:span text:style-name="T1655">Th</text:span><text:span text:style-name="T421">e dawn of Slavic</text:span>. New Haven.</text:p>
      <text:p text:style-name="P196"/>
      <text:p text:style-name="P209"><text:span text:style-name="T1656">Severjanov, Sergey. 1922. </text:span><text:span text:style-name="T421">Синайская псалтырь. Глаголитический памятникъ ХІ вѣка.</text:span> <text:span text:style-name="T1657">Petrograd.</text:span></text:p>
      <text:p text:style-name="P209"/>
      <text:p text:style-name="P209">Sims-Williams, P. 2018. “Mechanising Historical Phonology”. Transactions of the Philological Society Vol. 116/3. pp.555-573</text:p>
      <text:p text:style-name="P196"/>
      <text:p text:style-name="P210"><text:span text:style-name="T1658">Stojkov, Stojko. 1954. </text:span><text:span text:style-name="T421">Bălgarska dialektologija</text:span>. Sofija.</text:p>
      <text:p text:style-name="P210"/>
      <text:p text:style-name="P210">Tarnanidēs, Iōannēs Chr. <text:span text:style-name="T1659">1988. </text:span><text:span text:style-name="T421">The Slavonic Manuscripts Discovered in 1975 at St. Catherineʼs Monastery on Mount Sinai.</text:span> Thessaloniki:</text:p>
      <text:p text:style-name="P210"/>
      <text:p text:style-name="P211"><text:span text:style-name="T1660">Teneva, Evelina. 2012. Das Personalpronomen 1. p. sg. nom. im Slavischen und das abweichende aksl. </text:span><text:span text:style-name="T1661">azъ: </text:span><text:span text:style-name="T1662">Eine interdiziplin</text:span>äre Betrachtung und Alternativlösung im Licht der Soziolinguistik und Balkanistik. <text:span text:style-name="T1661">Linguistique Balkanique</text:span><text:span text:style-name="T1662"> </text:span><text:span text:style-name="T1661">LI(1)</text:span><text:span text:style-name="T1662">. 61-104.</text:span></text:p>
      <text:p text:style-name="P212"/>
      <text:p text:style-name="P212">Totomanova, Anna-Marija. 2014. <text:span text:style-name="T421">Iz bălgarskata istoričeska fonetika.</text:span> Sofija. </text:p>
      <text:p text:style-name="P212"/>
      <text:p text:style-name="P212">Townsend, Charles E. &amp; Janda, Laura A. 1996. <text:span text:style-name="T421">Common and comparative Slavic: Phonology and inflection. With special attention to Russian, Polish, Czech, Serbo-Croatian, Bulgarian</text:span>. Columbus (Ohio).</text:p>
      <text:p text:style-name="P196"/>
      <text:p text:style-name="P196"><text:span text:style-name="T1645">Trubačev</text:span>, O.N. (ed.). 1974-. <text:span text:style-name="T1644">E</text:span><text:span text:style-name="T421">timologi</text:span><text:span text:style-name="T1644">č</text:span><text:span text:style-name="T421">eskij slovar’ slavjanskix jazykov</text:span>. Moskva.</text:p>
      <text:p text:style-name="P196"/>
      <text:p text:style-name="P196">Trubetzkoy, Nikolaus S. 1954. <text:span text:style-name="T421">Altkirchenslavische Grammatik: Schri</text:span><text:span text:style-name="T1663">ft</text:span><text:span text:style-name="T421">-, Laut- und Formensystem.</text:span> Wien.</text:p>
      <text:p text:style-name="P196"/>
      <text:p text:style-name="P213">Vaillant André. 1942. L'article en vieux slave. <text:span text:style-name="T421">Revue des études slaves, tome 20, fascicule 1-4</text:span>. 5-12.</text:p>
      <text:p text:style-name="P196"/>
      <text:p text:style-name="P214">Van Wijk, N. 1929. Die aksl. Formen господѣ, господю und die Aussprache der Buchstaben ѣ, ю. <text:span text:style-name="T421">Zeitschrift für Slavische Philologie, Vol. 6, No. 3/4</text:span>. 363-368.</text:p>
      <text:p text:style-name="P196"/>
      <text:p text:style-name="P215"><text:soft-page-break/>Vermeer, William. 2014. Early Slavic dialect differences involving the consonant system. <text:s/><text:span text:style-name="T1645">In </text:span>Fortuin<text:span text:style-name="T1645">, </text:span>Egbert<text:span text:style-name="T1645"> &amp; Houtzagers, Peter &amp; Kalsbeek, Janneke </text:span>&amp; Dekker, Simeon<text:span text:style-name="T1645"> (eds.), </text:span><text:span text:style-name="T1644">Dutch contributions to the </text:span><text:span text:style-name="T421">Fif</text:span><text:span text:style-name="T1644">teenth International Congress of Slavists, </text:span><text:span text:style-name="T421">Minsk, 181-227</text:span>.<text:span text:style-name="T421"> </text:span>Amsterdam<text:span text:style-name="T421">.</text:span></text:p>
      <text:p text:style-name="P216"/>
      <text:p text:style-name="P217">Wandl, Florian &amp; Kavitskaja, Darya. 2023. On the reconstruction of contrastive secondary palatalization in Common Slavic. <text:span text:style-name="T421">Journal of Historical Linguistics 13(2). 220-254</text:span></text:p>
      <text:p text:style-name="P196"/>
      <text:p text:style-name="P218">Winslow, Joseph J. 2022. Old Church Slavonic phonemes: The problem of /j/ and /ě, a/ after palatals. <text:span text:style-name="T421">Die Welt der Slaven 67(2)</text:span>. 296-323.</text:p>
      <text:p text:style-name="P218"/>
      <text:p text:style-name="P218">Zaliznjak, Andrej A. 2004. <text:span text:style-name="T421">Drevnenovgorodskij dialekt. 2-e izdanie, pererabotannoe s učetom materiala nachodok 1995–2003 gg</text:span>. Moskva.</text:p>
      <text:p text:style-name="P218"/>
      <text:p text:style-name="P219"><text:span text:style-name="T1664">Велчева, Боряна</text:span>. 1981. <text:span text:style-name="T1664">Проблеми на глаголическата писменост:</text:span> <text:span text:style-name="T1664">Асеманиево Евангелие. In </text:span><text:span text:style-name="T1665">Константин-Кирил Философ: </text:span><text:span text:style-name="T421">Материали от научните конференции по случай 1150‑годишнината от рождението му, </text:span><text:span text:style-name="T1665">167-171</text:span><text:span text:style-name="T1664">. </text:span><text:span text:style-name="T1666">София</text:span><text:span text:style-name="T1664">.</text:span></text:p>
      <text:p text:style-name="P219"/>
      <text:p text:style-name="P220">Галинская, Елена. 2014. Прогрессивная палатализация и древненовгородское местоимение <text:span text:style-name="T421">въхе. Slavistica Vilnensis 59. </text:span>7-16.</text:p>
      <text:p text:style-name="P220"/>
      <text:p text:style-name="P221">Поливаново, А.К. 2013. Старославянский  язык - Грамматика · Словари. Москва.</text:p>
      <text:p text:style-name="P222"/>
      <text:p text:style-name="P222">Appendix 1: Glagolitic transliteration table</text:p>
      <text:p text:style-name="P222"/>
      <text:p text:style-name="P22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3">Glagolitic</text:p>
            </table:table-cell>
            <table:table-cell table:style-name="Table2.B1" office:value-type="string">
              <text:p text:style-name="P224">Latin</text:p>
            </table:table-cell>
            <table:table-cell table:style-name="Table2.B1" office:value-type="string">
              <text:p text:style-name="P225"/>
            </table:table-cell>
            <table:table-cell table:style-name="Table2.B1" office:value-type="string">
              <text:p text:style-name="P225"><text:span text:style-name="T1320">Commonly-used</text:span><text:span text:style-name="T1667"> </text:span>Cyrillic</text:p>
            </table:table-cell>
          </table:table-row>
        </table:table-header-rows>
        <table:table-row>
          <table:table-cell table:style-name="Table2.A1" office:value-type="string">
            <text:p text:style-name="P223"/>
          </table:table-cell>
          <table:table-cell table:style-name="Table2.B1" office:value-type="string">
            <text:p text:style-name="P224"/>
          </table:table-cell>
          <table:table-cell table:style-name="Table2.B1" office:value-type="string">
            <text:p text:style-name="P225"/>
          </table:table-cell>
          <table:table-cell table:style-name="Table2.B1" office:value-type="string">
            <text:p text:style-name="P225"/>
          </table:table-cell>
        </table:table-row>
        <table:table-row>
          <table:table-cell table:style-name="Table2.A1" office:value-type="string">
            <text:p text:style-name="P226">ⰰ</text:p>
          </table:table-cell>
          <table:table-cell table:style-name="Table2.B1" office:value-type="string">
            <text:p text:style-name="P227">a</text:p>
          </table:table-cell>
          <table:table-cell table:style-name="Table2.B1" office:value-type="string">
            <text:p text:style-name="P228"/>
          </table:table-cell>
          <table:table-cell table:style-name="Table2.B1" office:value-type="string">
            <text:p text:style-name="P228">а</text:p>
          </table:table-cell>
        </table:table-row>
        <table:table-row>
          <table:table-cell table:style-name="Table2.A1" office:value-type="string">
            <text:p text:style-name="P226">ⰱ</text:p>
          </table:table-cell>
          <table:table-cell table:style-name="Table2.B1" office:value-type="string">
            <text:p text:style-name="P227">b</text:p>
          </table:table-cell>
          <table:table-cell table:style-name="Table2.B1" office:value-type="string">
            <text:p text:style-name="P228"/>
          </table:table-cell>
          <table:table-cell table:style-name="Table2.B1" office:value-type="string">
            <text:p text:style-name="P228">б</text:p>
          </table:table-cell>
        </table:table-row>
        <table:table-row>
          <table:table-cell table:style-name="Table2.A1" office:value-type="string">
            <text:p text:style-name="P226">ⰲ</text:p>
          </table:table-cell>
          <table:table-cell table:style-name="Table2.B1" office:value-type="string">
            <text:p text:style-name="P227">v</text:p>
          </table:table-cell>
          <table:table-cell table:style-name="Table2.B1" office:value-type="string">
            <text:p text:style-name="P228"/>
          </table:table-cell>
          <table:table-cell table:style-name="Table2.B1" office:value-type="string">
            <text:p text:style-name="P228">в</text:p>
          </table:table-cell>
        </table:table-row>
        <table:table-row>
          <table:table-cell table:style-name="Table2.A1" office:value-type="string">
            <text:p text:style-name="P226">ⰳ</text:p>
          </table:table-cell>
          <table:table-cell table:style-name="Table2.B1" office:value-type="string">
            <text:p text:style-name="P227">g</text:p>
          </table:table-cell>
          <table:table-cell table:style-name="Table2.B1" office:value-type="string">
            <text:p text:style-name="P228"/>
          </table:table-cell>
          <table:table-cell table:style-name="Table2.B1" office:value-type="string">
            <text:p text:style-name="P228">г</text:p>
          </table:table-cell>
        </table:table-row>
        <table:table-row>
          <table:table-cell table:style-name="Table2.A1" office:value-type="string">
            <text:p text:style-name="P226">ⰴ</text:p>
          </table:table-cell>
          <table:table-cell table:style-name="Table2.B1" office:value-type="string">
            <text:p text:style-name="P227">d</text:p>
          </table:table-cell>
          <table:table-cell table:style-name="Table2.B1" office:value-type="string">
            <text:p text:style-name="P228"/>
          </table:table-cell>
          <table:table-cell table:style-name="Table2.B1" office:value-type="string">
            <text:p text:style-name="P228">д</text:p>
          </table:table-cell>
        </table:table-row>
        <table:table-row>
          <table:table-cell table:style-name="Table2.A1" office:value-type="string">
            <text:p text:style-name="P226">ⰵ</text:p>
          </table:table-cell>
          <table:table-cell table:style-name="Table2.B1" office:value-type="string">
            <text:p text:style-name="P227">e</text:p>
          </table:table-cell>
          <table:table-cell table:style-name="Table2.B1" office:value-type="string">
            <text:p text:style-name="P228"/>
          </table:table-cell>
          <table:table-cell table:style-name="Table2.B1" office:value-type="string">
            <text:p text:style-name="P228">е</text:p>
          </table:table-cell>
        </table:table-row>
        <table:table-row>
          <table:table-cell table:style-name="Table2.A1" office:value-type="string">
            <text:p text:style-name="P226">ⰶ</text:p>
          </table:table-cell>
          <table:table-cell table:style-name="Table2.B1" office:value-type="string">
            <text:p text:style-name="P227">ž</text:p>
          </table:table-cell>
          <table:table-cell table:style-name="Table2.B1" office:value-type="string">
            <text:p text:style-name="P228"/>
          </table:table-cell>
          <table:table-cell table:style-name="Table2.B1" office:value-type="string">
            <text:p text:style-name="P228">ж</text:p>
          </table:table-cell>
        </table:table-row>
        <table:table-row>
          <table:table-cell table:style-name="Table2.A1" office:value-type="string">
            <text:p text:style-name="P226">ⰷ</text:p>
          </table:table-cell>
          <table:table-cell table:style-name="Table2.B1" office:value-type="string">
            <text:p text:style-name="P227">ʒ</text:p>
          </table:table-cell>
          <table:table-cell table:style-name="Table2.B1" office:value-type="string">
            <text:p text:style-name="P228"/>
          </table:table-cell>
          <table:table-cell table:style-name="Table2.B1" office:value-type="string">
            <text:p text:style-name="P229">ѕ<text:span text:style-name="T1668">, </text:span><text:span text:style-name="T1669">ꙃ</text:span></text:p>
          </table:table-cell>
        </table:table-row>
        <table:table-row>
          <table:table-cell table:style-name="Table2.A1" office:value-type="string">
            <text:p text:style-name="P226">ⰸ</text:p>
          </table:table-cell>
          <table:table-cell table:style-name="Table2.B1" office:value-type="string">
            <text:p text:style-name="P227">z</text:p>
          </table:table-cell>
          <table:table-cell table:style-name="Table2.B1" office:value-type="string">
            <text:p text:style-name="P228"/>
          </table:table-cell>
          <table:table-cell table:style-name="Table2.B1" office:value-type="string">
            <text:p text:style-name="P229">з, <text:span text:style-name="T1669">ꙁ</text:span></text:p>
          </table:table-cell>
        </table:table-row>
        <table:table-row>
          <table:table-cell table:style-name="Table2.A1" office:value-type="string">
            <text:p text:style-name="P226">ⰺ</text:p>
          </table:table-cell>
          <table:table-cell table:style-name="Table2.B1" office:value-type="string">
            <text:p text:style-name="P230">ï</text:p>
          </table:table-cell>
          <table:table-cell table:style-name="Table2.B1" office:value-type="string">
            <text:p text:style-name="P228"/>
          </table:table-cell>
          <table:table-cell table:style-name="Table2.B1" office:value-type="string">
            <text:p text:style-name="P228">ї<text:span text:style-name="T1670">,</text:span><text:span text:style-name="T1671"> </text:span>ꙇ</text:p>
          </table:table-cell>
        </table:table-row>
        <table:table-row>
          <table:table-cell table:style-name="Table2.A1" office:value-type="string">
            <text:p text:style-name="P226">ⰹ</text:p>
          </table:table-cell>
          <table:table-cell table:style-name="Table2.B1" office:value-type="string">
            <text:p text:style-name="P227">ı</text:p>
          </table:table-cell>
          <table:table-cell table:style-name="Table2.B1" office:value-type="string">
            <text:p text:style-name="P231"/>
          </table:table-cell>
          <table:table-cell table:style-name="Table2.B1" office:value-type="string">
            <text:p text:style-name="P231">і</text:p>
          </table:table-cell>
        </table:table-row>
        <table:table-row>
          <table:table-cell table:style-name="Table2.A1" office:value-type="string">
            <text:p text:style-name="P226">ⰻ</text:p>
          </table:table-cell>
          <table:table-cell table:style-name="Table2.B1" office:value-type="string">
            <text:p text:style-name="P227">i</text:p>
          </table:table-cell>
          <table:table-cell table:style-name="Table2.B1" office:value-type="string">
            <text:p text:style-name="P231"/>
          </table:table-cell>
          <table:table-cell table:style-name="Table2.B1" office:value-type="string">
            <text:p text:style-name="P231">и</text:p>
          </table:table-cell>
        </table:table-row>
        <table:table-row>
          <table:table-cell table:style-name="Table2.A1" office:value-type="string">
            <text:p text:style-name="P226">ⰼ</text:p>
          </table:table-cell>
          <table:table-cell table:style-name="Table2.B1" office:value-type="string">
            <text:p text:style-name="P227">ǵ</text:p>
          </table:table-cell>
          <table:table-cell table:style-name="Table2.B1" office:value-type="string">
            <text:p text:style-name="P231"/>
          </table:table-cell>
          <table:table-cell table:style-name="Table2.B1" office:value-type="string">
            <text:p text:style-name="P232">ꙉ<text:span text:style-name="T1670">,</text:span> г<text:span text:style-name="T1672">̑, </text:span><text:span text:style-name="T1673">ђ</text:span></text:p>
          </table:table-cell>
        </table:table-row>
        <table:table-row>
          <table:table-cell table:style-name="Table2.A1" office:value-type="string">
            <text:p text:style-name="P226">ⰽ</text:p>
          </table:table-cell>
          <table:table-cell table:style-name="Table2.B1" office:value-type="string">
            <text:p text:style-name="P227">k</text:p>
          </table:table-cell>
          <table:table-cell table:style-name="Table2.B1" office:value-type="string">
            <text:p text:style-name="P231"/>
          </table:table-cell>
          <table:table-cell table:style-name="Table2.B1" office:value-type="string">
            <text:p text:style-name="P231">к</text:p>
          </table:table-cell>
        </table:table-row>
        <table:table-row>
          <table:table-cell table:style-name="Table2.A1" office:value-type="string">
            <text:p text:style-name="P226">ⰾ</text:p>
          </table:table-cell>
          <table:table-cell table:style-name="Table2.B1" office:value-type="string">
            <text:p text:style-name="P227">l</text:p>
          </table:table-cell>
          <table:table-cell table:style-name="Table2.B1" office:value-type="string">
            <text:p text:style-name="P231"/>
          </table:table-cell>
          <table:table-cell table:style-name="Table2.B1" office:value-type="string">
            <text:p text:style-name="P231">л</text:p>
          </table:table-cell>
        </table:table-row>
        <table:table-row>
          <table:table-cell table:style-name="Table2.A1" office:value-type="string">
            <text:p text:style-name="P226">ⰿ</text:p>
          </table:table-cell>
          <table:table-cell table:style-name="Table2.B1" office:value-type="string">
            <text:p text:style-name="P227">m</text:p>
          </table:table-cell>
          <table:table-cell table:style-name="Table2.B1" office:value-type="string">
            <text:p text:style-name="P231"/>
          </table:table-cell>
          <table:table-cell table:style-name="Table2.B1" office:value-type="string">
            <text:p text:style-name="P231">м</text:p>
          </table:table-cell>
        </table:table-row>
        <table:table-row>
          <table:table-cell table:style-name="Table2.A1" office:value-type="string">
            <text:p text:style-name="P226">ⱀ</text:p>
          </table:table-cell>
          <table:table-cell table:style-name="Table2.B1" office:value-type="string">
            <text:p text:style-name="P227">n</text:p>
          </table:table-cell>
          <table:table-cell table:style-name="Table2.B1" office:value-type="string">
            <text:p text:style-name="P231"/>
          </table:table-cell>
          <table:table-cell table:style-name="Table2.B1" office:value-type="string">
            <text:p text:style-name="P231">н</text:p>
          </table:table-cell>
        </table:table-row>
        <table:table-row>
          <table:table-cell table:style-name="Table2.A1" office:value-type="string">
            <text:p text:style-name="P226">ⱁ</text:p>
          </table:table-cell>
          <table:table-cell table:style-name="Table2.B1" office:value-type="string">
            <text:p text:style-name="P227">o</text:p>
          </table:table-cell>
          <table:table-cell table:style-name="Table2.B1" office:value-type="string">
            <text:p text:style-name="P231"/>
          </table:table-cell>
          <table:table-cell table:style-name="Table2.B1" office:value-type="string">
            <text:p text:style-name="P231">о</text:p>
          </table:table-cell>
        </table:table-row>
        <table:table-row>
          <table:table-cell table:style-name="Table2.A1" office:value-type="string">
            <text:p text:style-name="P226">ⱂ</text:p>
          </table:table-cell>
          <table:table-cell table:style-name="Table2.B1" office:value-type="string">
            <text:p text:style-name="P227">p</text:p>
          </table:table-cell>
          <table:table-cell table:style-name="Table2.B1" office:value-type="string">
            <text:p text:style-name="P231"/>
          </table:table-cell>
          <table:table-cell table:style-name="Table2.B1" office:value-type="string">
            <text:p text:style-name="P231">п</text:p>
          </table:table-cell>
        </table:table-row>
        <table:table-row>
          <table:table-cell table:style-name="Table2.A1" office:value-type="string">
            <text:p text:style-name="P226">ⱃ</text:p>
          </table:table-cell>
          <table:table-cell table:style-name="Table2.B1" office:value-type="string">
            <text:p text:style-name="P227">r</text:p>
          </table:table-cell>
          <table:table-cell table:style-name="Table2.B1" office:value-type="string">
            <text:p text:style-name="P231"/>
          </table:table-cell>
          <table:table-cell table:style-name="Table2.B1" office:value-type="string">
            <text:p text:style-name="P231">р</text:p>
          </table:table-cell>
        </table:table-row>
        <table:table-row>
          <table:table-cell table:style-name="Table2.A1" office:value-type="string">
            <text:p text:style-name="P226">ⱄ</text:p>
          </table:table-cell>
          <table:table-cell table:style-name="Table2.B1" office:value-type="string">
            <text:p text:style-name="P227">s</text:p>
          </table:table-cell>
          <table:table-cell table:style-name="Table2.B1" office:value-type="string">
            <text:p text:style-name="P231"/>
          </table:table-cell>
          <table:table-cell table:style-name="Table2.B1" office:value-type="string">
            <text:p text:style-name="P231">с</text:p>
          </table:table-cell>
        </table:table-row>
        <table:table-row>
          <table:table-cell table:style-name="Table2.A1" office:value-type="string">
            <text:p text:style-name="P226">ⱅ</text:p>
          </table:table-cell>
          <table:table-cell table:style-name="Table2.B1" office:value-type="string">
            <text:p text:style-name="P227">t</text:p>
          </table:table-cell>
          <table:table-cell table:style-name="Table2.B1" office:value-type="string">
            <text:p text:style-name="P231"/>
          </table:table-cell>
          <table:table-cell table:style-name="Table2.B1" office:value-type="string">
            <text:p text:style-name="P231">т</text:p>
          </table:table-cell>
        </table:table-row>
        <table:table-row>
          <table:table-cell table:style-name="Table2.A1" office:value-type="string">
            <text:p text:style-name="P226">ⱛ</text:p>
          </table:table-cell>
          <table:table-cell table:style-name="Table2.B1" office:value-type="string">
            <text:p text:style-name="P227">ϋ</text:p>
          </table:table-cell>
          <table:table-cell table:style-name="Table2.B1" office:value-type="string">
            <text:p text:style-name="P231"/>
          </table:table-cell>
          <table:table-cell table:style-name="Table2.B1" office:value-type="string">
            <text:p text:style-name="P231">ѵ<text:span text:style-name="T1670">,</text:span> y</text:p>
          </table:table-cell>
        </table:table-row>
        <table:table-row>
          <table:table-cell table:style-name="Table2.A1" office:value-type="string">
            <text:p text:style-name="P233">ⱇ</text:p>
          </table:table-cell>
          <table:table-cell table:style-name="Table2.B1" office:value-type="string">
            <text:p text:style-name="P234">f</text:p>
          </table:table-cell>
          <table:table-cell table:style-name="Table2.B1" office:value-type="string">
            <text:p text:style-name="P231"/>
          </table:table-cell>
          <table:table-cell table:style-name="Table2.B1" office:value-type="string">
            <text:p text:style-name="P231">ф</text:p>
          </table:table-cell>
        </table:table-row>
        <table:table-row>
          <table:table-cell table:style-name="Table2.A1" office:value-type="string">
            <text:p text:style-name="P233">ⱈ</text:p>
          </table:table-cell>
          <table:table-cell table:style-name="Table2.B1" office:value-type="string">
            <text:p text:style-name="P234">x</text:p>
          </table:table-cell>
          <table:table-cell table:style-name="Table2.B1" office:value-type="string">
            <text:p text:style-name="P231"/>
          </table:table-cell>
          <table:table-cell table:style-name="Table2.B1" office:value-type="string">
            <text:p text:style-name="P231">х</text:p>
          </table:table-cell>
        </table:table-row>
        <text:soft-page-break/>
        <table:table-row>
          <table:table-cell table:style-name="Table2.A1" office:value-type="string">
            <text:p text:style-name="P233">ⱉ</text:p>
          </table:table-cell>
          <table:table-cell table:style-name="Table2.B1" office:value-type="string">
            <text:p text:style-name="P234">ω</text:p>
          </table:table-cell>
          <table:table-cell table:style-name="Table2.B1" office:value-type="string">
            <text:p text:style-name="P231"/>
          </table:table-cell>
          <table:table-cell table:style-name="Table2.B1" office:value-type="string">
            <text:p text:style-name="P231">ѡ</text:p>
          </table:table-cell>
        </table:table-row>
        <table:table-row>
          <table:table-cell table:style-name="Table2.A1" office:value-type="string">
            <text:p text:style-name="P233">ⱚ</text:p>
          </table:table-cell>
          <table:table-cell table:style-name="Table2.B1" office:value-type="string">
            <text:p text:style-name="P235">θ</text:p>
          </table:table-cell>
          <table:table-cell table:style-name="Table2.B1" office:value-type="string">
            <text:p text:style-name="P231"/>
          </table:table-cell>
          <table:table-cell table:style-name="Table2.B1" office:value-type="string">
            <text:p text:style-name="P231">ѳ</text:p>
          </table:table-cell>
        </table:table-row>
        <table:table-row>
          <table:table-cell table:style-name="Table2.A1" office:value-type="string">
            <text:p text:style-name="P233">ⱌ</text:p>
          </table:table-cell>
          <table:table-cell table:style-name="Table2.B1" office:value-type="string">
            <text:p text:style-name="P234">c</text:p>
          </table:table-cell>
          <table:table-cell table:style-name="Table2.B1" office:value-type="string">
            <text:p text:style-name="P231"/>
          </table:table-cell>
          <table:table-cell table:style-name="Table2.B1" office:value-type="string">
            <text:p text:style-name="P231">ц</text:p>
          </table:table-cell>
        </table:table-row>
        <table:table-row>
          <table:table-cell table:style-name="Table2.A1" office:value-type="string">
            <text:p text:style-name="P233">ⱍ</text:p>
          </table:table-cell>
          <table:table-cell table:style-name="Table2.B1" office:value-type="string">
            <text:p text:style-name="P234">č</text:p>
          </table:table-cell>
          <table:table-cell table:style-name="Table2.B1" office:value-type="string">
            <text:p text:style-name="P231"/>
          </table:table-cell>
          <table:table-cell table:style-name="Table2.B1" office:value-type="string">
            <text:p text:style-name="P231">ч</text:p>
          </table:table-cell>
        </table:table-row>
        <table:table-row>
          <table:table-cell table:style-name="Table2.A1" office:value-type="string">
            <text:p text:style-name="P233">ⱎ</text:p>
          </table:table-cell>
          <table:table-cell table:style-name="Table2.B1" office:value-type="string">
            <text:p text:style-name="P234">š</text:p>
          </table:table-cell>
          <table:table-cell table:style-name="Table2.B1" office:value-type="string">
            <text:p text:style-name="P231"/>
          </table:table-cell>
          <table:table-cell table:style-name="Table2.B1" office:value-type="string">
            <text:p text:style-name="P231">ш</text:p>
          </table:table-cell>
        </table:table-row>
        <table:table-row>
          <table:table-cell table:style-name="Table2.A1" office:value-type="string">
            <text:p text:style-name="P233">ⱋ</text:p>
          </table:table-cell>
          <table:table-cell table:style-name="Table2.B1" office:value-type="string">
            <text:p text:style-name="P236">ć</text:p>
          </table:table-cell>
          <table:table-cell table:style-name="Table2.B1" office:value-type="string">
            <text:p text:style-name="P231"/>
          </table:table-cell>
          <table:table-cell table:style-name="Table2.B1" office:value-type="string">
            <text:p text:style-name="P231">щ</text:p>
          </table:table-cell>
        </table:table-row>
        <table:table-row>
          <table:table-cell table:style-name="Table2.A1" office:value-type="string">
            <text:p text:style-name="P233">ⱏ</text:p>
          </table:table-cell>
          <table:table-cell table:style-name="Table2.B1" office:value-type="string">
            <text:p text:style-name="P237">ŭ</text:p>
          </table:table-cell>
          <table:table-cell table:style-name="Table2.B1" office:value-type="string">
            <text:p text:style-name="P231"/>
          </table:table-cell>
          <table:table-cell table:style-name="Table2.B1" office:value-type="string">
            <text:p text:style-name="P231">ъ</text:p>
          </table:table-cell>
        </table:table-row>
        <table:table-row>
          <table:table-cell table:style-name="Table2.A1" office:value-type="string">
            <text:p text:style-name="P233">ⱐ</text:p>
          </table:table-cell>
          <table:table-cell table:style-name="Table2.B1" office:value-type="string">
            <text:p text:style-name="P237">ĭ</text:p>
          </table:table-cell>
          <table:table-cell table:style-name="Table2.B1" office:value-type="string">
            <text:p text:style-name="P231"/>
          </table:table-cell>
          <table:table-cell table:style-name="Table2.B1" office:value-type="string">
            <text:p text:style-name="P231">ь</text:p>
          </table:table-cell>
        </table:table-row>
        <table:table-row>
          <table:table-cell table:style-name="Table2.A1" office:value-type="string">
            <text:p text:style-name="P238">ⱑ</text:p>
          </table:table-cell>
          <table:table-cell table:style-name="Table2.B1" office:value-type="string">
            <text:p text:style-name="P227">ě</text:p>
          </table:table-cell>
          <table:table-cell table:style-name="Table2.B1" office:value-type="string">
            <text:p text:style-name="P231"/>
          </table:table-cell>
          <table:table-cell table:style-name="Table2.B1" office:value-type="string">
            <text:p text:style-name="P231">ѣ</text:p>
          </table:table-cell>
        </table:table-row>
        <table:table-row>
          <table:table-cell table:style-name="Table2.A1" office:value-type="string">
            <text:p text:style-name="P239">ⱆ</text:p>
          </table:table-cell>
          <table:table-cell table:style-name="Table2.B1" office:value-type="string">
            <text:p text:style-name="P227">u</text:p>
          </table:table-cell>
          <table:table-cell table:style-name="Table2.B1" office:value-type="string">
            <text:p text:style-name="P231"/>
          </table:table-cell>
          <table:table-cell table:style-name="Table2.B1" office:value-type="string">
            <text:p text:style-name="P231">оу, ѹ</text:p>
          </table:table-cell>
        </table:table-row>
        <table:table-row>
          <table:table-cell table:style-name="Table2.A1" office:value-type="string">
            <text:p text:style-name="P239">ⱓ</text:p>
          </table:table-cell>
          <table:table-cell table:style-name="Table2.B1" office:value-type="string">
            <text:p text:style-name="P236">ü</text:p>
          </table:table-cell>
          <table:table-cell table:style-name="Table2.B1" office:value-type="string">
            <text:p text:style-name="P240"/>
          </table:table-cell>
          <table:table-cell table:style-name="Table2.B1" office:value-type="string">
            <text:p text:style-name="P240">ю</text:p>
          </table:table-cell>
        </table:table-row>
        <table:table-row>
          <table:table-cell table:style-name="Table2.A1" office:value-type="string">
            <text:p text:style-name="P239">ⱘ</text:p>
          </table:table-cell>
          <table:table-cell table:style-name="Table2.B1" office:value-type="string">
            <text:p text:style-name="P236">ǫ</text:p>
          </table:table-cell>
          <table:table-cell table:style-name="Table2.B1" office:value-type="string">
            <text:p text:style-name="P240"/>
          </table:table-cell>
          <table:table-cell table:style-name="Table2.B1" office:value-type="string">
            <text:p text:style-name="P240">ѫ</text:p>
          </table:table-cell>
        </table:table-row>
        <table:table-row>
          <table:table-cell table:style-name="Table2.A1" office:value-type="string">
            <text:p text:style-name="P239">ⱙ</text:p>
          </table:table-cell>
          <table:table-cell table:style-name="Table2.B1" office:value-type="string">
            <text:p text:style-name="P241">ǫ̈</text:p>
          </table:table-cell>
          <table:table-cell table:style-name="Table2.B1" office:value-type="string">
            <text:p text:style-name="P240"/>
          </table:table-cell>
          <table:table-cell table:style-name="Table2.B1" office:value-type="string">
            <text:p text:style-name="P240">ѭ</text:p>
          </table:table-cell>
        </table:table-row>
        <table:table-row>
          <table:table-cell table:style-name="Table2.A1" office:value-type="string">
            <text:p text:style-name="P239">ⱗ</text:p>
          </table:table-cell>
          <table:table-cell table:style-name="Table2.B1" office:value-type="string">
            <text:p text:style-name="P234">ę</text:p>
          </table:table-cell>
          <table:table-cell table:style-name="Table2.B1" office:value-type="string">
            <text:p text:style-name="P240"/>
          </table:table-cell>
          <table:table-cell table:style-name="Table2.B1" office:value-type="string">
            <text:p text:style-name="P240">ѩ, ѧ</text:p>
          </table:table-cell>
        </table:table-row>
        <table:table-row>
          <table:table-cell table:style-name="Table2.A1" office:value-type="string">
            <text:p text:style-name="P239">ⱔ</text:p>
          </table:table-cell>
          <table:table-cell table:style-name="Table2.B1" office:value-type="string">
            <text:p text:style-name="P242">ɴ</text:p>
          </table:table-cell>
          <table:table-cell table:style-name="Table2.B1" office:value-type="string">
            <text:p text:style-name="P240"/>
          </table:table-cell>
          <table:table-cell table:style-name="Table2.B1" office:value-type="string">
            <text:p text:style-name="P240">ѧ</text:p>
          </table:table-cell>
        </table:table-row>
        <table:table-row>
          <table:table-cell table:style-name="Table2.A1" office:value-type="string">
            <text:p text:style-name="P243">ⱕ</text:p>
          </table:table-cell>
          <table:table-cell table:style-name="Table2.B1" office:value-type="string">
            <text:p text:style-name="P244">ɴ<text:span text:style-name="T1674">̨</text:span></text:p>
          </table:table-cell>
          <table:table-cell table:style-name="Table2.B1" office:value-type="string">
            <text:p text:style-name="P240"/>
          </table:table-cell>
          <table:table-cell table:style-name="Table2.B1" office:value-type="string">
            <text:p text:style-name="P245">ꙙ</text:p>
          </table:table-cell>
        </table:table-row>
      </table:table>
      <text:p text:style-name="P2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4-01T03:24:35.180693661</dc:date>
    <meta:editing-duration>P20DT5H17M55S</meta:editing-duration>
    <meta:editing-cycles>1805</meta:editing-cycles>
    <meta:generator>LibreOffice/26.2.0.3$Linux_X86_64 LibreOffice_project/620$Build-3</meta:generator>
    <meta:print-date>2026-02-13T09:23:41.793751180</meta:print-date>
    <meta:printed-by>PDF files</meta:printed-by>
    <meta:document-statistic meta:table-count="3" meta:image-count="10" meta:object-count="0" meta:page-count="25" meta:paragraph-count="367" meta:word-count="13164" meta:character-count="84956" meta:non-whitespace-character-count="71990"/>
  </office:meta>
</office:document-meta>
</file>